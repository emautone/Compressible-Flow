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layout-cache" manifest:media-type="application/binary"/>
  <manifest:file-entry manifest:full-path="Pictures/10000201000001E8000001BEE59B6706939AE59D.png" manifest:media-type="image/png"/>
  <manifest:file-entry manifest:full-path="Pictures/10000201000003010000024180D6C59D1CBADD3A.png" manifest:media-type="image/png"/>
  <manifest:file-entry manifest:full-path="Pictures/10002D4600004F7A00003BA25CD61F15D779F285.svg" manifest:media-type="image/svg+xml"/>
  <manifest:file-entry manifest:full-path="Pictures/100002010000030100000241760A638759D1988D.png" manifest:media-type="image/png"/>
  <manifest:file-entry manifest:full-path="Pictures/10002D2F00004F7A00003BA22E013147D4510290.svg" manifest:media-type="image/svg+xml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erif CJK SC" svg:font-family="'Noto Serif CJK S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f239b"/>
    </style:style>
    <style:style style:name="P4" style:family="paragraph" style:parent-style-name="Standard">
      <style:paragraph-properties fo:text-align="center" style:justify-single-word="false"/>
      <style:text-properties officeooo:paragraph-rsid="002a9259"/>
    </style:style>
    <style:style style:name="P5" style:family="paragraph" style:parent-style-name="Standard">
      <style:paragraph-properties fo:text-align="center" style:justify-single-word="false"/>
      <style:text-properties officeooo:paragraph-rsid="00312ff1"/>
    </style:style>
    <style:style style:name="P6" style:family="paragraph" style:parent-style-name="Standard">
      <style:paragraph-properties fo:text-align="center" style:justify-single-word="false"/>
      <style:text-properties officeooo:paragraph-rsid="003b0910"/>
    </style:style>
    <style:style style:name="P7" style:family="paragraph" style:parent-style-name="Standard">
      <style:paragraph-properties fo:text-align="center" style:justify-single-word="false"/>
      <style:text-properties officeooo:rsid="00221d08" officeooo:paragraph-rsid="00221d08"/>
    </style:style>
    <style:style style:name="P8" style:family="paragraph" style:parent-style-name="Standard">
      <style:paragraph-properties fo:text-align="start" style:justify-single-word="false"/>
      <style:text-properties officeooo:rsid="00221d08" officeooo:paragraph-rsid="00221d08"/>
    </style:style>
    <style:style style:name="P9" style:family="paragraph" style:parent-style-name="Standard">
      <style:paragraph-properties fo:text-align="start" style:justify-single-word="false"/>
      <style:text-properties officeooo:rsid="00221d08" officeooo:paragraph-rsid="002c230a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221d08"/>
    </style:style>
    <style:style style:name="P12" style:family="paragraph" style:parent-style-name="Standard">
      <style:paragraph-properties fo:text-align="start" style:justify-single-word="false"/>
      <style:text-properties officeooo:paragraph-rsid="00312ff1"/>
    </style:style>
    <style:style style:name="P13" style:family="paragraph" style:parent-style-name="Standard">
      <style:paragraph-properties fo:text-align="start" style:justify-single-word="false"/>
      <style:text-properties officeooo:paragraph-rsid="00367fe7"/>
    </style:style>
    <style:style style:name="P14" style:family="paragraph" style:parent-style-name="Standard">
      <style:paragraph-properties fo:text-align="start" style:justify-single-word="false"/>
      <style:text-properties officeooo:paragraph-rsid="004b5b67"/>
    </style:style>
    <style:style style:name="P15" style:family="paragraph" style:parent-style-name="Standard">
      <style:paragraph-properties fo:text-align="start" style:justify-single-word="false"/>
      <style:text-properties officeooo:paragraph-rsid="0051bfa8"/>
    </style:style>
    <style:style style:name="P16" style:family="paragraph" style:parent-style-name="Standard">
      <style:paragraph-properties fo:text-align="start" style:justify-single-word="false"/>
      <style:text-properties officeooo:paragraph-rsid="005daf1d"/>
    </style:style>
    <style:style style:name="P17" style:family="paragraph" style:parent-style-name="Standard">
      <style:paragraph-properties fo:text-align="start" style:justify-single-word="false"/>
      <style:text-properties officeooo:paragraph-rsid="00631047"/>
    </style:style>
    <style:style style:name="P18" style:family="paragraph" style:parent-style-name="Standard">
      <style:paragraph-properties fo:text-align="start" style:justify-single-word="false"/>
      <style:text-properties officeooo:paragraph-rsid="006568d3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paragraph-rsid="00221d0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4b5b67" officeooo:paragraph-rsid="004c3c53"/>
    </style:style>
    <style:style style:name="P21" style:family="paragraph" style:parent-style-name="Standard">
      <style:paragraph-properties fo:text-align="start" style:justify-single-word="false"/>
      <style:text-properties officeooo:rsid="004b5b67" officeooo:paragraph-rsid="004b5b67"/>
    </style:style>
    <style:style style:name="P22" style:family="paragraph" style:parent-style-name="Standard">
      <style:paragraph-properties fo:text-align="start" style:justify-single-word="false"/>
      <style:text-properties officeooo:rsid="004c3c53" officeooo:paragraph-rsid="004c3c53"/>
    </style:style>
    <style:style style:name="P23" style:family="paragraph" style:parent-style-name="Standard">
      <style:paragraph-properties fo:text-align="start" style:justify-single-word="false"/>
      <style:text-properties officeooo:rsid="0051bfa8" officeooo:paragraph-rsid="0051bfa8"/>
    </style:style>
    <style:style style:name="P24" style:family="paragraph" style:parent-style-name="Standard">
      <style:paragraph-properties fo:text-align="start" style:justify-single-word="false"/>
      <style:text-properties officeooo:rsid="00531b65" officeooo:paragraph-rsid="00531b65"/>
    </style:style>
    <style:style style:name="P25" style:family="paragraph" style:parent-style-name="Standard">
      <style:paragraph-properties fo:text-align="start" style:justify-single-word="false"/>
      <style:text-properties fo:font-size="10pt" fo:font-style="italic" officeooo:paragraph-rsid="004c3c53" fo:background-color="transparent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ize="10pt" fo:font-style="italic" officeooo:rsid="004c3c53" officeooo:paragraph-rsid="004c3c53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ize="10pt" fo:font-style="italic" officeooo:rsid="00625055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ize="10pt" fo:font-style="italic" officeooo:rsid="00625055" officeooo:paragraph-rsid="00625055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ize="10pt" officeooo:paragraph-rsid="004d8118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paragraph-rsid="0051bfa8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paragraph-rsid="005daf1d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tyle="italic" fo:font-weight="bold" officeooo:rsid="00221d08" officeooo:paragraph-rsid="00312ff1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italic" fo:font-weight="bold" officeooo:rsid="00221d08" officeooo:paragraph-rsid="00367fe7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4c3c53" officeooo:paragraph-rsid="00500436" style:font-weight-asian="bold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officeooo:paragraph-rsid="002fba27"/>
    </style:style>
    <style:style style:name="P36" style:family="paragraph" style:parent-style-name="Standard">
      <style:paragraph-properties fo:text-align="center" style:justify-single-word="false" fo:break-before="page"/>
      <style:text-properties fo:font-weight="bold" officeooo:rsid="004c3c53" officeooo:paragraph-rsid="004c3c53" style:font-weight-asian="bold" style:font-weight-complex="bold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start" style:justify-single-word="false"/>
      <style:text-properties officeooo:paragraph-rsid="006fb2e9"/>
    </style:style>
    <style:style style:name="P39" style:family="paragraph" style:parent-style-name="Standard">
      <style:paragraph-properties fo:text-align="start" style:justify-single-word="false"/>
      <style:text-properties officeooo:paragraph-rsid="00717df7"/>
    </style:style>
    <style:style style:name="P40" style:family="paragraph" style:parent-style-name="Standard">
      <style:paragraph-properties fo:text-align="start" style:justify-single-word="false"/>
      <style:text-properties fo:font-size="10pt" fo:font-style="italic" officeooo:paragraph-rsid="006fb2e9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ize="10pt" fo:font-style="italic" officeooo:paragraph-rsid="00717df7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normal" officeooo:paragraph-rsid="00715e98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4c3c53" officeooo:paragraph-rsid="00500436" style:font-weight-asian="normal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officeooo:paragraph-rsid="006fb2e9"/>
    </style:style>
    <style:style style:name="P45" style:family="paragraph">
      <style:paragraph-properties fo:margin-left="0cm" fo:margin-right="0cm" fo:margin-top="0cm" fo:margin-bottom="0cm" fo:line-height="100%" fo:text-indent="0cm" style:writing-mode="lr-tb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hatch" draw:fill-color="#000000" draw:fill-hatch-name="Blue_20_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hatch" draw:fill-color="#000000" draw:fill-hatch-name="Blue_20_-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officeooo:rsid="00221d08"/>
    </style:style>
    <style:style style:name="T2" style:family="text">
      <style:text-properties style:font-name="Liberation Serif1" fo:font-style="italic" style:font-style-asian="italic" style:font-style-complex="italic"/>
    </style:style>
    <style:style style:name="T3" style:family="text">
      <style:text-properties style:font-name="Liberation Serif1" fo:font-style="italic" fo:font-weight="normal" officeooo:rsid="00221d08" style:font-style-asian="italic" style:font-weight-asian="normal" style:font-style-complex="italic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221d08" style:font-style-asian="italic" style:font-style-complex="italic"/>
    </style:style>
    <style:style style:name="T7" style:family="text">
      <style:text-properties style:text-position="sub 58%" fo:font-style="italic" officeooo:rsid="002a9259" style:font-style-asian="italic" style:font-style-complex="italic"/>
    </style:style>
    <style:style style:name="T8" style:family="text">
      <style:text-properties style:text-position="sub 58%" fo:font-style="italic" officeooo:rsid="002f326f" style:font-style-asian="italic" style:font-style-complex="italic"/>
    </style:style>
    <style:style style:name="T9" style:family="text">
      <style:text-properties style:text-position="sub 58%" fo:font-style="italic" fo:font-weight="normal" officeooo:rsid="00367fe7" style:font-style-asian="italic" style:font-weight-asian="normal" style:font-style-complex="italic" style:font-weight-complex="normal"/>
    </style:style>
    <style:style style:name="T10" style:family="text">
      <style:text-properties style:text-position="sub 58%" fo:font-style="italic" fo:font-weight="normal" officeooo:rsid="003b0910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21d08" style:font-style-asian="italic" style:font-style-complex="italic"/>
    </style:style>
    <style:style style:name="T13" style:family="text">
      <style:text-properties fo:font-style="italic" officeooo:rsid="002a9259" style:font-style-asian="italic" style:font-style-complex="italic"/>
    </style:style>
    <style:style style:name="T14" style:family="text">
      <style:text-properties fo:font-style="italic" officeooo:rsid="002342d7" style:font-style-asian="italic" style:font-style-complex="italic"/>
    </style:style>
    <style:style style:name="T15" style:family="text">
      <style:text-properties fo:font-style="italic" officeooo:rsid="003194f9" style:font-style-asian="italic" style:font-style-complex="italic"/>
    </style:style>
    <style:style style:name="T16" style:family="text">
      <style:text-properties fo:font-style="italic" officeooo:rsid="00335771" style:font-style-asian="italic" style:font-style-complex="italic"/>
    </style:style>
    <style:style style:name="T17" style:family="text">
      <style:text-properties fo:font-style="italic" officeooo:rsid="002d4fb0" style:font-style-asian="italic" style:font-style-complex="italic"/>
    </style:style>
    <style:style style:name="T18" style:family="text">
      <style:text-properties fo:font-style="italic" fo:font-weight="bold" officeooo:rsid="00221d08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fba27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12ff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7fe7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367fe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b0910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a9259" style:font-style-asian="italic" style:font-weight-asian="normal" style:font-style-complex="italic" style:font-weight-complex="normal"/>
    </style:style>
    <style:style style:name="T25" style:family="text">
      <style:text-properties fo:font-style="italic" officeooo:rsid="0051bfa8" fo:background-color="transparent" loext:char-shading-value="0" style:font-style-asian="italic" style:font-style-complex="italic"/>
    </style:style>
    <style:style style:name="T26" style:family="text">
      <style:text-properties fo:font-style="italic" officeooo:rsid="00531b65" fo:background-color="transparent" loext:char-shading-value="0" style:font-style-asian="italic" style:font-style-complex="italic"/>
    </style:style>
    <style:style style:name="T27" style:family="text">
      <style:text-properties fo:font-style="italic" officeooo:rsid="00547277" fo:background-color="transparent" loext:char-shading-value="0" style:font-style-asian="italic" style:font-style-complex="italic"/>
    </style:style>
    <style:style style:name="T28" style:family="text">
      <style:text-properties fo:font-style="italic" officeooo:rsid="00537436" fo:background-color="transparent" loext:char-shading-value="0" style:font-style-asian="italic" style:font-style-complex="italic"/>
    </style:style>
    <style:style style:name="T29" style:family="text">
      <style:text-properties fo:font-style="italic" officeooo:rsid="004d8118" fo:background-color="transparent" loext:char-shading-value="0" style:font-style-asian="italic" style:font-style-complex="italic"/>
    </style:style>
    <style:style style:name="T30" style:family="text">
      <style:text-properties fo:font-style="italic" officeooo:rsid="00517f42" fo:background-color="transparent" loext:char-shading-value="0" style:font-style-asian="italic" style:font-style-complex="italic"/>
    </style:style>
    <style:style style:name="T31" style:family="text">
      <style:text-properties fo:font-style="italic" officeooo:rsid="005616a5" fo:background-color="transparent" loext:char-shading-value="0" style:font-style-asian="italic" style:font-style-complex="italic"/>
    </style:style>
    <style:style style:name="T32" style:family="text">
      <style:text-properties fo:font-style="italic" officeooo:rsid="00586452" fo:background-color="transparent" loext:char-shading-value="0" style:font-style-asian="italic" style:font-style-complex="italic"/>
    </style:style>
    <style:style style:name="T33" style:family="text">
      <style:text-properties fo:font-style="italic" officeooo:rsid="0059b3bb" fo:background-color="transparent" loext:char-shading-value="0" style:font-style-asian="italic" style:font-style-complex="italic"/>
    </style:style>
    <style:style style:name="T34" style:family="text">
      <style:text-properties fo:font-style="italic" officeooo:rsid="005c10d4" fo:background-color="transparent" loext:char-shading-value="0" style:font-style-asian="italic" style:font-style-complex="italic"/>
    </style:style>
    <style:style style:name="T35" style:family="text">
      <style:text-properties fo:font-style="italic" officeooo:rsid="00625055" fo:background-color="transparent" loext:char-shading-value="0" style:font-style-asian="italic" style:font-style-complex="italic"/>
    </style:style>
    <style:style style:name="T36" style:family="text">
      <style:text-properties officeooo:rsid="002342d7"/>
    </style:style>
    <style:style style:name="T37" style:family="text">
      <style:text-properties officeooo:rsid="00256e2d"/>
    </style:style>
    <style:style style:name="T38" style:family="text">
      <style:text-properties style:text-position="super 58%" fo:font-style="italic" officeooo:rsid="00256e2d" style:font-style-asian="italic" style:font-style-complex="italic"/>
    </style:style>
    <style:style style:name="T39" style:family="text">
      <style:text-properties style:text-position="0% 100%" fo:font-style="italic" officeooo:rsid="00256e2d" style:font-style-asian="italic" style:font-style-complex="italic"/>
    </style:style>
    <style:style style:name="T40" style:family="text">
      <style:text-properties officeooo:rsid="0028d76d"/>
    </style:style>
    <style:style style:name="T41" style:family="text">
      <style:text-properties officeooo:rsid="002a9259"/>
    </style:style>
    <style:style style:name="T42" style:family="text">
      <style:text-properties officeooo:rsid="002c230a"/>
    </style:style>
    <style:style style:name="T43" style:family="text">
      <style:text-properties officeooo:rsid="002fba27"/>
    </style:style>
    <style:style style:name="T44" style:family="text">
      <style:text-properties officeooo:rsid="003194f9"/>
    </style:style>
    <style:style style:name="T45" style:family="text">
      <style:text-properties officeooo:rsid="00367fe7"/>
    </style:style>
    <style:style style:name="T46" style:family="text">
      <style:text-properties fo:font-style="normal" fo:font-weight="normal" officeooo:rsid="00367fe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21d0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c230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a925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81c1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b0910" style:font-style-asian="normal" style:font-weight-asian="normal" style:font-style-complex="normal" style:font-weight-complex="normal"/>
    </style:style>
    <style:style style:name="T52" style:family="text">
      <style:text-properties officeooo:rsid="004b5b67"/>
    </style:style>
    <style:style style:name="T53" style:family="text">
      <style:text-properties officeooo:rsid="004c3c53"/>
    </style:style>
    <style:style style:name="T54" style:family="text">
      <style:text-properties officeooo:rsid="00537436"/>
    </style:style>
    <style:style style:name="T55" style:family="text">
      <style:text-properties officeooo:rsid="00547277"/>
    </style:style>
    <style:style style:name="T56" style:family="text">
      <style:text-properties officeooo:rsid="00586452"/>
    </style:style>
    <style:style style:name="T57" style:family="text">
      <style:text-properties fo:font-size="10pt" fo:font-style="italic" officeooo:rsid="004c3c53" fo:background-color="transparent" loext:char-shading-value="0" style:font-size-asian="10pt" style:font-style-asian="italic" style:font-size-complex="10pt" style:font-style-complex="italic"/>
    </style:style>
    <style:style style:name="T58" style:family="text">
      <style:text-properties fo:font-size="10pt" fo:font-style="italic" officeooo:rsid="004d8118" fo:background-color="transparent" loext:char-shading-value="0" style:font-size-asian="10pt" style:font-style-asian="italic" style:font-size-complex="10pt" style:font-style-complex="italic"/>
    </style:style>
    <style:style style:name="T59" style:family="text">
      <style:text-properties fo:font-size="10pt" fo:font-style="italic" officeooo:rsid="0060ea4d" fo:background-color="transparent" loext:char-shading-value="0" style:font-size-asian="10pt" style:font-style-asian="italic" style:font-size-complex="10pt" style:font-style-complex="italic"/>
    </style:style>
    <style:style style:name="T60" style:family="text">
      <style:text-properties fo:font-size="10pt" fo:font-style="italic" officeooo:rsid="005616a5" fo:background-color="transparent" loext:char-shading-value="0" style:font-size-asian="10pt" style:font-style-asian="italic" style:font-size-complex="10pt" style:font-style-complex="italic"/>
    </style:style>
    <style:style style:name="T61" style:family="text">
      <style:text-properties fo:font-size="10pt" fo:font-style="italic" officeooo:rsid="00586452" fo:background-color="transparent" loext:char-shading-value="0" style:font-size-asian="10pt" style:font-style-asian="italic" style:font-size-complex="10pt" style:font-style-complex="italic"/>
    </style:style>
    <style:style style:name="T62" style:family="text">
      <style:text-properties fo:font-size="10pt" fo:font-style="italic" style:font-size-asian="10pt" style:font-style-asian="italic" style:font-size-complex="10pt" style:font-style-complex="italic"/>
    </style:style>
    <style:style style:name="T63" style:family="text">
      <style:text-properties fo:font-size="10pt" fo:font-style="italic" officeooo:rsid="00625055" style:font-size-asian="10pt" style:font-style-asian="italic" style:font-size-complex="10pt" style:font-style-complex="italic"/>
    </style:style>
    <style:style style:name="T64" style:family="text">
      <style:text-properties fo:font-size="10pt" fo:font-style="italic" officeooo:rsid="00715e98" style:font-size-asian="10pt" style:font-style-asian="italic" style:font-size-complex="10pt" style:font-style-complex="italic"/>
    </style:style>
    <style:style style:name="T65" style:family="text">
      <style:text-properties fo:font-size="10pt" fo:font-style="italic" officeooo:rsid="006fb2e9" style:font-size-asian="10pt" style:font-style-asian="italic" style:font-size-complex="10pt" style:font-style-complex="italic"/>
    </style:style>
    <style:style style:name="T66" style:family="text">
      <style:text-properties fo:font-size="10pt" fo:font-style="italic" officeooo:rsid="00717df7" style:font-size-asian="10pt" style:font-style-asian="italic" style:font-size-complex="10pt" style:font-style-complex="italic"/>
    </style:style>
    <style:style style:name="T67" style:family="text">
      <style:text-properties fo:font-size="10pt" fo:font-style="italic" officeooo:rsid="0071dc65" style:font-size-asian="10pt" style:font-style-asian="italic" style:font-size-complex="10pt" style:font-style-complex="italic"/>
    </style:style>
    <style:style style:name="T68" style:family="text">
      <style:text-properties fo:font-size="10pt" officeooo:rsid="00715e98" style:font-size-asian="10pt" style:font-size-complex="10pt"/>
    </style:style>
    <style:style style:name="T69" style:family="text">
      <style:text-properties fo:font-size="10pt" officeooo:rsid="006fb2e9" style:font-size-asian="10pt" style:font-size-complex="10pt"/>
    </style:style>
    <style:style style:name="T70" style:family="text">
      <style:text-properties fo:font-size="10pt" officeooo:rsid="0071dc65" style:font-size-asian="10pt" style:font-size-complex="10pt"/>
    </style:style>
    <style:style style:name="T71" style:family="text">
      <style:text-properties officeooo:rsid="00625055"/>
    </style:style>
    <style:style style:name="T72" style:family="text">
      <style:text-properties fo:font-size="12pt" fo:font-style="normal" officeooo:rsid="00631047" style:font-size-asian="12pt" style:font-style-asian="normal" style:font-size-complex="12pt" style:font-style-complex="normal"/>
    </style:style>
    <style:style style:name="T73" style:family="text">
      <style:text-properties fo:font-size="12pt" fo:font-style="normal" officeooo:rsid="0068f31e" style:font-size-asian="12pt" style:font-style-asian="normal" style:font-size-complex="12pt" style:font-style-complex="normal"/>
    </style:style>
    <style:style style:name="T74" style:family="text">
      <style:text-properties fo:font-size="12pt" fo:font-style="normal" officeooo:rsid="006e4ec7" style:font-size-asian="12pt" style:font-style-asian="normal" style:font-size-complex="12pt" style:font-style-complex="normal"/>
    </style:style>
    <style:style style:name="T75" style:family="text">
      <style:text-properties officeooo:rsid="006568d3"/>
    </style:style>
    <style:style style:name="T76" style:family="text">
      <style:text-properties officeooo:rsid="006fb2e9"/>
    </style:style>
    <style:style style:name="T77" style:family="text">
      <style:text-properties officeooo:rsid="00715e98"/>
    </style:style>
    <style:style style:name="T78" style:family="text">
      <style:text-properties officeooo:rsid="0071dc65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0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25cm" fo:min-width="4.5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402cm" fo:min-width="1.9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729fcf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Pontas_20_das_20_setas_20_1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Pontas_20_das_20_setas_20_2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dash" draw:stroke-dash="Dash" svg:stroke-width="0cm" svg:stroke-color="#000000" draw:marker-start="" draw:marker-start-width="0.199cm" draw:marker-start-center="false" draw:marker-end="" draw:marker-end-width="0.199cm" draw:marker-end-center="false" draw:fill="none" draw:fill-color="#80808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7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dash" draw:stroke-dash="Dash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258cm" fo:min-width="4.0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377cm" fo:min-width="4.0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256cm" fo:min-width="4.0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374cm" fo:min-width="4.0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-45_20_Degrees" draw:textarea-horizontal-align="justify" draw:textarea-vertical-align="middle" draw:auto-grow-height="false" fo:min-height="0.295cm" fo:min-width="2.4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Pontas_20_das_20_setas_20_3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dash" draw:stroke-dash="Dash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dash" draw:stroke-dash="Dash" svg:stroke-width="0cm" svg:stroke-color="#000000" draw:marker-start="" draw:marker-start-width="0.199cm" draw:marker-start-center="false" draw:marker-end="Pontas_20_das_20_setas_20_3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dash" draw:stroke-dash="Dash" svg:stroke-width="0cm" svg:stroke-color="#000000" draw:marker-start="" draw:marker-start-width="0.199cm" draw:marker-start-center="false" draw:marker-end="Pontas_20_das_20_setas_20_2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249cm" fo:min-width="4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367cm" fo:min-width="1.9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25cm" fo:min-width="4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367cm" fo:min-width="1.9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25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hatch" draw:fill-color="#000000" draw:fill-hatch-name="Blue_20_45_20_Degrees" draw:textarea-horizontal-align="justify" draw:textarea-vertical-align="middle" draw:auto-grow-height="false" fo:min-height="0.367cm" fo:min-width="3.95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Expansão </text:span><text:span text:style-name="T12">Prandtl-Meyer - </text:span><text:span text:style-name="T1">Escoamento </text:span><text:span text:style-name="T40">Compressível </text:span><text:span text:style-name="T1">Supersônico Isentrópico</text:span></text:p>
      <text:p text:style-name="P7"/>
      <text:p text:style-name="P11"><text:span text:style-name="T18">Caso Especial:</text:span><text:span text:style-name="T1"> </text:span><text:span text:style-name="T37">N</text:span><text:span text:style-name="T1">úmero de Mach de entrada sônico (</text:span><text:span text:style-name="T12">M</text:span><text:span text:style-name="T6">1 </text:span><text:span text:style-name="T39">= 1</text:span><text:span text:style-name="T1">)</text:span></text:p>
      <text:p text:style-name="P9"><draw:g text:anchor-type="paragraph" draw:z-index="3" draw:name="Forma1" draw:style-name="gr40"><draw:g draw:style-name="gr37"><draw:line draw:style-name="gr3" draw:text-style-name="P47" svg:x1="4.296cm" svg:y1="3.586cm" svg:x2="9.046cm" svg:y2="3.586cm"><text:p/></draw:line><draw:line draw:style-name="gr3" draw:text-style-name="P47" svg:x1="9.046cm" svg:y1="3.586cm" svg:x2="12.546cm" svg:y2="6.336cm"><text:p/></draw:line><draw:custom-shape draw:style-name="gr41" draw:text-style-name="P48" svg:width="4.5cm" svg:height="0.502cm" svg:x="4.297cm" svg:y="3.589cm"><text:p/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48" svg:width="4.453cm" svg:height="0.618cm" draw:transform="rotate (-0.671951762017817) translate (9.02052777777778cm 3.556cm)"><text:p/><draw:enhanced-geometry svg:viewBox="0 0 21600 21600" draw:mirror-horizontal="false" draw:mirror-vertical="false" draw:type="rectangle" draw:enhanced-path="M 0 0 L 21600 0 21600 21600 0 21600 0 0 Z N"/></draw:custom-shape><draw:line draw:style-name="gr6" draw:text-style-name="P47" svg:x1="9.046cm" svg:y1="3.59cm" svg:x2="9.046cm" svg:y2="0.34cm"><text:p/></draw:line><draw:line draw:style-name="gr6" draw:text-style-name="P47" svg:x1="9.046cm" svg:y1="3.59cm" svg:x2="11.296cm" svg:y2="1.09cm"><text:p/></draw:line><draw:line draw:style-name="gr7" draw:text-style-name="P47" svg:x1="5.796cm" svg:y1="1.838cm" svg:x2="7.796cm" svg:y2="1.838cm"><text:p/></draw:line><draw:line draw:style-name="gr8" draw:text-style-name="P47" svg:x1="11.047cm" svg:y1="2.838cm" svg:x2="12.797cm" svg:y2="4.338cm"><text:p/></draw:line><draw:line draw:style-name="gr9" draw:text-style-name="P49" svg:x1="9.046cm" svg:y1="3.586cm" svg:x2="10.796cm" svg:y2="3.586cm"><text:p/></draw:line></draw:g><draw:frame draw:style-name="gr10" draw:text-style-name="P46" svg:width="1.751cm" svg:height="0.659cm" svg:x="5.796cm" svg:y="1.194cm"><draw:text-box><text:p text:style-name="P54"><text:span text:style-name="T79">M</text:span><text:span text:style-name="T80">1</text:span><text:span text:style-name="T79"> </text:span><text:span text:style-name="T79">=</text:span><text:span text:style-name="T79"> </text:span><text:span text:style-name="T79">1</text:span></text:p></draw:text-box></draw:frame><draw:frame draw:style-name="gr2" draw:text-style-name="P46" svg:width="1.751cm" svg:height="1.5cm" svg:x="11.547cm" svg:y="2.839cm"><draw:text-box><text:p text:style-name="P54"><text:span text:style-name="T79">M</text:span><text:span text:style-name="T80">2</text:span><text:span text:style-name="T79"> </text:span><text:span text:style-name="T79">&gt;</text:span><text:span text:style-name="T79"> </text:span><text:span text:style-name="T79">M</text:span><text:span text:style-name="T80">1</text:span></text:p></draw:text-box></draw:frame><draw:frame draw:style-name="gr10" draw:text-style-name="P46" svg:width="0.5cm" svg:height="0.659cm" svg:x="9.797cm" svg:y="3.589cm"><draw:text-box><text:p text:style-name="P54"><text:span text:style-name="T83">ν</text:span></text:p></draw:text-box></draw:frame><draw:ellipse draw:style-name="gr12" draw:text-style-name="P50" svg:width="0.752cm" svg:height="1.001cm" svg:x="9.045cm" svg:y="3.125cm" draw:kind="arc" draw:start-angle="296.7" draw:end-angle="4.18"><text:p/></draw:ellipse></draw:g>Para encontrar o <text:span text:style-name="T11">ângulo de expansão do escoamento</text:span> (<text:span text:style-name="T2">ν</text:span>), <text:span text:style-name="T42">d</text:span><text:span text:style-name="T41">ado o valor do número de Mach após a expansão (</text:span><text:span text:style-name="T13">M</text:span><text:span text:style-name="T7">2</text:span><text:span text:style-name="T41">):</text:span></text:p>
      <text:p text:style-name="P4"><text:span text:style-name="T1"><draw:frame draw:style-name="fr3" draw:name="Objeto2" text:anchor-type="as-char" svg:y="-0.635cm" svg:width="1.704cm" svg:height="1.028cm" draw:z-index="1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1"><text:tab/><text:tab/></text:span><draw:frame draw:style-name="fr3" draw:name="Objeto1" text:anchor-type="as-char" svg:y="-0.482cm" svg:width="2.265cm" svg:height="0.637cm" draw:z-index="14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"/>
      <text:p text:style-name="P2"><draw:frame draw:style-name="fr3" draw:name="Objeto8" text:anchor-type="as-char" svg:y="-0.672cm" svg:width="5.787cm" svg:height="1.139cm" draw:z-index="15"><draw:object xlink:href="./Object 8" xlink:type="simple" xlink:show="embed" xlink:actuate="onLoad"/><draw:image xlink:href="./ObjectReplacements/Object 8" xlink:type="simple" xlink:show="embed" xlink:actuate="onLoad"/><svg:desc>fórmula</svg:desc></draw:frame><text:tab/><text:tab/><text:span text:style-name="T16">Ângulo em radianos</text:span></text:p>
      <text:p text:style-name="P2"/>
      <text:p text:style-name="P8">Para encontrar <text:span text:style-name="T11">o número de Mach</text:span> <text:span text:style-name="T15">após a expansão</text:span><text:span text:style-name="T44"> </text:span>(<text:span text:style-name="T11">M</text:span><text:span text:style-name="T5">2</text:span>) em função do ângulo de expansão do escoamento (<text:span text:style-name="T2">ν</text:span>), usamos o método de solução por <text:span text:style-name="T11">Newton-Raphson</text:span>:</text:p>
      <text:p text:style-name="P2"/>
      <text:p text:style-name="P2"><draw:frame draw:style-name="fr3" draw:name="Objeto5" text:anchor-type="as-char" svg:y="-0.672cm" svg:width="6.412cm" svg:height="1.139cm" draw:z-index="0"><draw:object xlink:href="./Object 5" xlink:type="simple" xlink:show="embed" xlink:actuate="onLoad"/><draw:image xlink:href="./ObjectReplacements/Object 5" xlink:type="simple" xlink:show="embed" xlink:actuate="onLoad"/></draw:frame><text:tab/><text:span text:style-name="T12">Função objetivo</text:span></text:p>
      <text:p text:style-name="P2"/>
      <text:p text:style-name="P3"><draw:frame draw:style-name="fr3" draw:name="Objeto16" text:anchor-type="as-char" svg:y="-0.723cm" svg:width="7.278cm" svg:height="1.268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tab/><draw:frame draw:style-name="fr3" draw:name="Objeto17" text:anchor-type="as-char" svg:y="-0.683cm" svg:width="6.269cm" svg:height="1.15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3"/>
      <text:p text:style-name="P3"><draw:frame draw:style-name="fr3" draw:name="Objeto15" text:anchor-type="as-char" svg:y="-1.291cm" svg:width="8.195cm" svg:height="2.348cm" draw:z-index="19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2"/>
      <text:p text:style-name="P2"><draw:frame draw:style-name="fr3" draw:name="Objeto6" text:anchor-type="as-char" svg:y="-0.683cm" svg:width="14.259cm" svg:height="1.205cm" draw:z-index="1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2"/>
      <text:p text:style-name="P2"><draw:frame draw:style-name="fr3" draw:name="Objeto7" text:anchor-type="as-char" svg:y="-0.743cm" svg:width="4.641cm" svg:height="1.244cm" draw:z-index="2"><draw:object xlink:href="./Object 7" xlink:type="simple" xlink:show="embed" xlink:actuate="onLoad"/><draw:image xlink:href="./ObjectReplacements/Object 7" xlink:type="simple" xlink:show="embed" xlink:actuate="onLoad"/></draw:frame><text:tab/><text:tab/><text:tab/><text:span text:style-name="T17">Usar como v</text:span><text:span text:style-name="T14">alor </text:span><text:span text:style-name="T17">inicial,</text:span><text:span text:style-name="T36"> </text:span><text:span text:style-name="T14">M</text:span><text:span text:style-name="T8">2</text:span><text:span text:style-name="T38">1</text:span><text:span text:style-name="T14">=1,1</text:span></text:p>
      <text:p text:style-name="P2"/>
      <text:p text:style-name="P2"/>
      <text:p text:style-name="P35"><text:span text:style-name="T18">Caso </text:span><text:span text:style-name="T19">Convencional</text:span><text:span text:style-name="T18">:</text:span><text:span text:style-name="T1"> </text:span><text:span text:style-name="T45">Escoamento supersônico com d</text:span><text:span text:style-name="T43">ados </text:span><text:span text:style-name="T45">d</text:span><text:span text:style-name="T43">os n</text:span><text:span text:style-name="T1">úmero</text:span><text:span text:style-name="T43">s</text:span><text:span text:style-name="T1"> de Mach </text:span><text:span text:style-name="T43">antes e após a expansão</text:span></text:p>
      <text:p text:style-name="P2"><draw:g text:anchor-type="paragraph" draw:z-index="10" draw:name="Forma2" draw:style-name="gr1"><draw:line draw:style-name="gr3" draw:text-style-name="P47" svg:x1="1.702cm" svg:y1="3.305cm" svg:x2="6.509cm" svg:y2="3.305cm"><text:p/></draw:line><draw:line draw:style-name="gr3" draw:text-style-name="P47" svg:x1="6.514cm" svg:y1="3.305cm" svg:x2="10.056cm" svg:y2="6.088cm"><text:p/></draw:line><draw:custom-shape draw:style-name="gr14" draw:text-style-name="P48" svg:width="4.553cm" svg:height="0.509cm" svg:x="1.706cm" svg:y="3.304cm"><text:p/><draw:enhanced-geometry svg:viewBox="0 0 21600 21600" draw:type="rectangle" draw:enhanced-path="M 0 0 L 21600 0 21600 21600 0 21600 0 0 Z N"/></draw:custom-shape><draw:custom-shape draw:style-name="gr15" draw:text-style-name="P48" svg:width="4.504cm" svg:height="0.629cm" draw:transform="skewX (0.002792526803191) rotate (-0.671951762017817) translate (6.48758333333333cm 3.27201388888889cm)"><text:p/><draw:enhanced-geometry svg:viewBox="0 0 21600 21600" draw:type="rectangle" draw:enhanced-path="M 0 0 L 21600 0 21600 21600 0 21600 0 0 Z N"/></draw:custom-shape><draw:line draw:style-name="gr6" draw:text-style-name="P47" svg:x1="6.514cm" svg:y1="3.305cm" svg:x2="6.514cm" svg:y2="0.015cm"><text:p/></draw:line><draw:line draw:style-name="gr6" draw:text-style-name="P47" svg:x1="6.514cm" svg:y1="3.306cm" svg:x2="8.792cm" svg:y2="0.776cm"><text:p/></draw:line><draw:line draw:style-name="gr7" draw:text-style-name="P47" svg:x1="3.223cm" svg:y1="1.533cm" svg:x2="5.247cm" svg:y2="1.533cm"><text:p/></draw:line><draw:line draw:style-name="gr8" draw:text-style-name="P47" svg:x1="8.537cm" svg:y1="2.545cm" svg:x2="10.308cm" svg:y2="4.063cm"><text:p/></draw:line><draw:line draw:style-name="gr9" draw:text-style-name="P49" svg:x1="6.514cm" svg:y1="3.305cm" svg:x2="8.285cm" svg:y2="3.305cm"><text:p/></draw:line><draw:frame draw:style-name="gr16" draw:text-style-name="P46" svg:width="1.772cm" svg:height="0.68cm" svg:x="3.223cm" svg:y="0.88cm"><draw:text-box><text:p text:style-name="P45"><text:span text:style-name="T79">M</text:span><text:span text:style-name="T80">1</text:span><text:span text:style-name="T79"> </text:span><text:span text:style-name="T79">&gt;</text:span><text:span text:style-name="T79"> </text:span><text:span text:style-name="T79">1</text:span></text:p></draw:text-box></draw:frame><draw:frame draw:style-name="gr17" draw:text-style-name="P46" svg:width="1.772cm" svg:height="1.518cm" svg:x="9.042cm" svg:y="2.545cm"><draw:text-box><text:p text:style-name="P45"><text:span text:style-name="T79">M</text:span><text:span text:style-name="T80">2</text:span><text:span text:style-name="T79"> </text:span><text:span text:style-name="T79">&gt;</text:span><text:span text:style-name="T79"> </text:span><text:span text:style-name="T79">M</text:span><text:span text:style-name="T80">1</text:span></text:p></draw:text-box></draw:frame><draw:frame draw:style-name="gr16" draw:text-style-name="P46" svg:width="0.503cm" svg:height="0.68cm" svg:x="7.273cm" svg:y="3.304cm"><draw:text-box><text:p text:style-name="P45"><text:span text:style-name="T83">δ</text:span></text:p></draw:text-box></draw:frame><draw:ellipse draw:style-name="gr12" draw:text-style-name="P50" svg:width="0.761cm" svg:height="1.013cm" svg:x="6.512cm" svg:y="2.835cm" draw:kind="arc" draw:start-angle="296.7" draw:end-angle="4.18"><text:p/></draw:ellipse><draw:line draw:style-name="gr3" draw:text-style-name="P47" svg:x1="2.972cm" svg:y1="10.137cm" svg:x2="7.779cm" svg:y2="10.137cm"><text:p/></draw:line><draw:line draw:style-name="gr3" draw:text-style-name="P47" svg:x1="7.777cm" svg:y1="10.137cm" svg:x2="11.319cm" svg:y2="12.92cm"><text:p/></draw:line><draw:custom-shape draw:style-name="gr18" draw:text-style-name="P48" svg:width="4.555cm" svg:height="0.507cm" svg:x="2.985cm" svg:y="10.195cm"><text:p/><draw:enhanced-geometry svg:viewBox="0 0 21600 21600" draw:type="rectangle" draw:enhanced-path="M 0 0 L 21600 0 21600 21600 0 21600 0 0 Z N"/></draw:custom-shape><draw:custom-shape draw:style-name="gr19" draw:text-style-name="P48" svg:width="4.506cm" svg:height="0.625cm" draw:transform="skewX (0.00279252680319104) rotate (-0.671951762017817) translate (7.75581944444444cm 10.1017916666667cm)"><text:p/><draw:enhanced-geometry svg:viewBox="0 0 21600 21600" draw:type="rectangle" draw:enhanced-path="M 0 0 L 21600 0 21600 21600 0 21600 0 0 Z N"/></draw:custom-shape><draw:line draw:style-name="gr6" draw:text-style-name="P47" svg:x1="7.777cm" svg:y1="10.139cm" svg:x2="8.536cm" svg:y2="6.849cm"><text:p/></draw:line><draw:line draw:style-name="gr6" draw:text-style-name="P47" svg:x1="7.777cm" svg:y1="10.135cm" svg:x2="9.801cm" svg:y2="7.352cm"><text:p/></draw:line><draw:line draw:style-name="gr7" draw:text-style-name="P47" svg:x1="3.223cm" svg:y1="9.63cm" svg:x2="7.525cm" svg:y2="9.63cm"><text:p/></draw:line><draw:line draw:style-name="gr8" draw:text-style-name="P47" svg:x1="9.801cm" svg:y1="9.377cm" svg:x2="11.572cm" svg:y2="10.895cm"><text:p/></draw:line><draw:line draw:style-name="gr9" draw:text-style-name="P49" svg:x1="7.777cm" svg:y1="10.137cm" svg:x2="9.548cm" svg:y2="10.137cm"><text:p/></draw:line><draw:frame draw:style-name="gr16" draw:text-style-name="P46" svg:width="1.772cm" svg:height="0.68cm" svg:x="4.488cm" svg:y="8.977cm"><draw:text-box><text:p text:style-name="P45"><text:span text:style-name="T79">M</text:span><text:span text:style-name="T80">1</text:span><text:span text:style-name="T79"> </text:span><text:span text:style-name="T79">&gt;</text:span><text:span text:style-name="T79"> </text:span><text:span text:style-name="T79">1</text:span></text:p></draw:text-box></draw:frame><draw:frame draw:style-name="gr20" draw:text-style-name="P46" svg:width="1.772cm" svg:height="1.519cm" svg:x="10.308cm" svg:y="9.377cm"><draw:text-box><text:p text:style-name="P45"><text:span text:style-name="T79">M</text:span><text:span text:style-name="T80">2</text:span><text:span text:style-name="T79"> </text:span><text:span text:style-name="T79">&gt;</text:span><text:span text:style-name="T79"> </text:span><text:span text:style-name="T79">M</text:span><text:span text:style-name="T80">1</text:span></text:p></draw:text-box></draw:frame><draw:frame draw:style-name="gr21" draw:text-style-name="P46" svg:width="1.013cm" svg:height="0.798cm" svg:x="6.513cm" svg:y="8.073cm"><draw:text-box><text:p text:style-name="P45"><text:span text:style-name="T83">ν</text:span><text:span text:style-name="T82">2</text:span></text:p></draw:text-box></draw:frame><draw:ellipse draw:style-name="gr12" draw:text-style-name="P50" svg:width="0.763cm" svg:height="1.013cm" svg:x="7.776cm" svg:y="9.666cm" draw:kind="arc" draw:start-angle="296.7" draw:end-angle="4.18"><text:p/></draw:ellipse><draw:line draw:style-name="gr22" draw:text-style-name="P47" svg:x1="2.97cm" svg:y1="10.137cm" svg:x2="0.44cm" svg:y2="11.655cm"><text:p/></draw:line><draw:line draw:style-name="gr3" draw:text-style-name="P47" svg:x1="2.97cm" svg:y1="10.137cm" svg:x2="0.44cm" svg:y2="11.655cm"><text:p/></draw:line><draw:custom-shape draw:style-name="gr23" draw:text-style-name="P51" svg:width="2.939cm" svg:height="0.546cm" draw:transform="rotate (0.548207918051419) translate (0.435680555555556cm 11.6857638888889cm)"><text:p/><draw:enhanced-geometry svg:viewBox="0 0 21600 21600" draw:type="rectangle" draw:enhanced-path="M 0 0 L 21600 0 21600 21600 0 21600 0 0 Z N"/></draw:custom-shape><draw:line draw:style-name="gr6" draw:text-style-name="P47" svg:x1="2.971cm" svg:y1="10.136cm" svg:x2="2.718cm" svg:y2="7.1cm"><text:p/></draw:line><draw:line draw:style-name="gr6" draw:text-style-name="P47" svg:x1="2.97cm" svg:y1="10.136cm" svg:x2="1.452cm" svg:y2="7.606cm"><text:p/></draw:line><draw:line draw:style-name="gr24" draw:text-style-name="P47" svg:x1="0.187cm" svg:y1="10.136cm" svg:x2="1.452cm" svg:y2="9.377cm"><text:p/></draw:line><draw:frame draw:style-name="gr17" draw:text-style-name="P46" svg:width="1.772cm" svg:height="1.518cm" svg:x="-0.319cm" svg:y="9.125cm"><draw:text-box><text:p text:style-name="P45"><text:span text:style-name="T79">M</text:span><text:span text:style-name="T80">0</text:span><text:span text:style-name="T79"> </text:span><text:span text:style-name="T79">=</text:span><text:span text:style-name="T79"> </text:span><text:span text:style-name="T79">1</text:span></text:p></draw:text-box></draw:frame><draw:line draw:style-name="gr9" draw:text-style-name="P49" svg:x1="1.201cm" svg:y1="10.137cm" svg:x2="2.972cm" svg:y2="10.137cm"><text:p/></draw:line><draw:ellipse draw:style-name="gr12" draw:text-style-name="P50" svg:width="0.759cm" svg:height="1.011cm" svg:x="1.96cm" svg:y="9.684cm" draw:kind="arc" draw:start-angle="175.87" draw:end-angle="237.76"><text:p/></draw:ellipse><draw:frame draw:style-name="gr25" draw:text-style-name="P46" svg:width="1.013cm" svg:height="1.054cm" svg:x="1.198cm" svg:y="10.135cm"><draw:text-box><text:p text:style-name="P45"><text:span text:style-name="T83">ν</text:span><text:span text:style-name="T82">1</text:span></text:p></draw:text-box></draw:frame><draw:frame draw:style-name="gr26" draw:text-style-name="P52" svg:width="1.77cm" svg:height="1.098cm" svg:x="4.743cm" svg:y="5.077cm"><draw:text-box><text:p text:style-name="P45"><text:span text:style-name="T84">=</text:span></text:p></draw:text-box></draw:frame><draw:line draw:style-name="gr27" draw:text-style-name="P53" svg:x1="2.972cm" svg:y1="10.136cm" svg:x2="5.755cm" svg:y2="8.365cm"><text:p/></draw:line><draw:line draw:style-name="gr27" draw:text-style-name="P53" svg:x1="7.777cm" svg:y1="10.136cm" svg:x2="5.753cm" svg:y2="8.365cm"><text:p/></draw:line><draw:line draw:style-name="gr9" draw:text-style-name="P49" svg:x1="5.753cm" svg:y1="8.365cm" svg:x2="7.018cm" svg:y2="7.606cm"><text:p/></draw:line><draw:ellipse draw:style-name="gr12" draw:text-style-name="P50" svg:width="0.759cm" svg:height="1.011cm" svg:x="5.754cm" svg:y="7.897cm" draw:kind="arc" draw:start-angle="296.7" draw:end-angle="49.67"><text:p/></draw:ellipse><draw:line draw:style-name="gr28" draw:text-style-name="P53" svg:x1="5.754cm" svg:y1="8.365cm" svg:x2="4.489cm" svg:y2="6.341cm"><text:p/></draw:line><draw:line draw:style-name="gr28" draw:text-style-name="P53" svg:x1="5.753cm" svg:y1="8.365cm" svg:x2="6.512cm" svg:y2="6.341cm"><text:p/></draw:line><draw:line draw:style-name="gr29" draw:text-style-name="P47" svg:x1="3.223cm" svg:y1="8.365cm" svg:x2="4.488cm" svg:y2="7.606cm"><text:p/></draw:line><draw:line draw:style-name="gr30" draw:text-style-name="P47" svg:x1="6.765cm" svg:y1="6.849cm" svg:x2="8.03cm" svg:y2="7.861cm"><text:p/></draw:line><draw:frame draw:style-name="gr17" draw:text-style-name="P46" svg:width="1.773cm" svg:height="1.518cm" svg:x="2.971cm" svg:y="7.1cm"><draw:text-box><text:p text:style-name="P45"><text:span text:style-name="T79">M</text:span><text:span text:style-name="T80">0</text:span><text:span text:style-name="T79"> </text:span><text:span text:style-name="T79">=</text:span><text:span text:style-name="T79"> </text:span><text:span text:style-name="T79">1</text:span></text:p></draw:text-box></draw:frame><draw:frame draw:style-name="gr17" draw:text-style-name="P46" svg:width="1.773cm" svg:height="1.518cm" svg:x="7.017cm" svg:y="6.594cm"><draw:text-box><text:p text:style-name="P45"><text:span text:style-name="T79">M</text:span><text:span text:style-name="T80">2</text:span></text:p></draw:text-box></draw:frame><draw:frame draw:style-name="gr31" draw:text-style-name="P46" svg:width="1.772cm" svg:height="1.452cm" svg:x="8.537cm" svg:y="10.135cm"><draw:text-box><text:p text:style-name="P45"><text:span text:style-name="T83">δ</text:span><text:span text:style-name="T83">=</text:span><text:span text:style-name="T83">ν</text:span><text:span text:style-name="T82">2</text:span><text:span text:style-name="T81">-</text:span><text:span text:style-name="T81">ν</text:span><text:span text:style-name="T82">1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><draw:frame draw:style-name="fr3" draw:name="Objeto12" text:anchor-type="as-char" svg:y="-0.319cm" svg:width="1.907cm" svg:height="0.473cm" draw:z-index="2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><text:span text:style-name="T18">Caso </text:span><text:span text:style-name="T20">Especial</text:span><text:span text:style-name="T18">: </text:span><text:span text:style-name="T46">Escoamento sônico</text:span><text:span text:style-name="T22"> </text:span><text:span text:style-name="T46">com</text:span><text:span text:style-name="T22"> </text:span><text:span text:style-name="T46">expansão máxima para número de Mach infinito após a expansão (pressão estática zero)</text:span></text:p>
      <text:p text:style-name="P5"><draw:g text:anchor-type="paragraph" draw:z-index="8" draw:name="Forma3" draw:style-name="gr1"><draw:frame draw:style-name="gr2" draw:text-style-name="P46" svg:width="1.751cm" svg:height="1.5cm" svg:x="7.366cm" svg:y="2.765cm"><draw:text-box><text:p text:style-name="P54"><text:span text:style-name="T79">M</text:span><text:span text:style-name="T80">2</text:span><text:span text:style-name="T79"> </text:span><text:span text:style-name="T79">&gt;</text:span><text:span text:style-name="T79"> </text:span><text:span text:style-name="T79">M</text:span><text:span text:style-name="T80">1</text:span></text:p></draw:text-box></draw:frame><draw:g draw:style-name="gr37"><draw:line draw:style-name="gr3" draw:text-style-name="P47" svg:x1="0.116cm" svg:y1="3.516cm" svg:x2="4.866cm" svg:y2="3.516cm"><text:p/></draw:line><draw:line draw:style-name="gr3" draw:text-style-name="P47" svg:x1="4.863cm" svg:y1="3.516cm" svg:x2="4.863cm" svg:y2="6.488cm"><text:p/></draw:line><draw:custom-shape draw:style-name="gr38" draw:text-style-name="P48" svg:width="4.749cm" svg:height="0.502cm" svg:x="0.116cm" svg:y="3.515cm"><text:p/><draw:enhanced-geometry svg:viewBox="0 0 21600 21600" draw:type="rectangle" draw:enhanced-path="M 0 0 L 21600 0 21600 21600 0 21600 0 0 Z N"/></draw:custom-shape><draw:custom-shape draw:style-name="gr39" draw:text-style-name="P48" svg:width="2.453cm" svg:height="0.618cm" draw:transform="rotate (-1.57515964992488) translate (4.86304166666667cm 4.03754166666667cm)"><text:p/><draw:enhanced-geometry svg:viewBox="0 0 21600 21600" draw:mirror-vertical="false" draw:mirror-horizontal="false" draw:type="rectangle" draw:enhanced-path="M 0 0 L 21600 0 21600 21600 0 21600 0 0 Z N"/></draw:custom-shape><draw:line draw:style-name="gr6" draw:text-style-name="P47" svg:x1="4.863cm" svg:y1="3.516cm" svg:x2="4.863cm" svg:y2="0.266cm"><text:p/></draw:line><draw:line draw:style-name="gr6" draw:text-style-name="P47" svg:x1="4.863cm" svg:y1="3.516cm" svg:x2="7.113cm" svg:y2="1.016cm"><text:p/></draw:line><draw:line draw:style-name="gr7" draw:text-style-name="P47" svg:x1="1.614cm" svg:y1="1.764cm" svg:x2="3.614cm" svg:y2="1.764cm"><text:p/></draw:line><draw:line draw:style-name="gr8" draw:text-style-name="P47" svg:x1="6.865cm" svg:y1="2.764cm" svg:x2="8.615cm" svg:y2="4.264cm"><text:p/></draw:line><draw:line draw:style-name="gr9" draw:text-style-name="P49" svg:x1="4.863cm" svg:y1="3.516cm" svg:x2="6.613cm" svg:y2="3.516cm"><text:p/></draw:line><draw:frame draw:style-name="gr10" draw:text-style-name="P46" svg:width="1.751cm" svg:height="0.659cm" svg:x="1.615cm" svg:y="1.12cm"><draw:text-box><text:p text:style-name="P54"><text:span text:style-name="T79">M</text:span><text:span text:style-name="T80">1</text:span><text:span text:style-name="T79"> </text:span><text:span text:style-name="T79">=</text:span><text:span text:style-name="T79"> </text:span><text:span text:style-name="T79">1</text:span></text:p></draw:text-box></draw:frame><draw:frame draw:style-name="gr11" draw:text-style-name="P46" svg:width="1.751cm" svg:height="1.828cm" svg:x="5.616cm" svg:y="3.515cm"><draw:text-box><text:p text:style-name="P54"><text:span text:style-name="T83">ν</text:span><text:span text:style-name="T82">m</text:span><text:span text:style-name="T82">a</text:span><text:span text:style-name="T82">x</text:span></text:p></draw:text-box></draw:frame><draw:ellipse draw:style-name="gr12" draw:text-style-name="P50" svg:width="0.752cm" svg:height="1.001cm" svg:x="4.864cm" svg:y="3.052cm" draw:kind="arc" draw:start-angle="296.7" draw:end-angle="4.18"><text:p/></draw:ellipse><draw:line draw:style-name="gr13" draw:text-style-name="P47" svg:x1="4.863cm" svg:y1="3.489cm" svg:x2="6.363cm" svg:y2="4.989cm"><text:p/></draw:line></draw:g></draw:g></text:p>
      <text:p text:style-name="P2"/>
      <text:p text:style-name="P2"/>
      <text:p text:style-name="P2"/>
      <text:p text:style-name="P2"/>
      <text:p text:style-name="P2"><draw:frame draw:style-name="fr3" draw:name="Objeto10" text:anchor-type="as-char" svg:y="-0.413cm" svg:width="2.974cm" svg:height="0.79cm" draw:z-index="4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3"><text:soft-page-break/><text:span text:style-name="T18">Caso </text:span><text:span text:style-name="T20">Especial</text:span><text:span text:style-name="T18">:</text:span><text:span text:style-name="T1"> </text:span><text:span text:style-name="T46">Escoamento supersônico com expansão máxima para número de Mach infinito após a expansão (pressão estática zero)</text:span></text:p>
      <text:p text:style-name="P5"><draw:g text:anchor-type="paragraph" draw:z-index="11" draw:name="Forma4" draw:style-name="gr1"><draw:frame draw:style-name="gr2" draw:text-style-name="P46" svg:width="1.848cm" svg:height="1.5cm" svg:x="7.672cm" svg:y="2.972cm"><draw:text-box><text:p text:style-name="P45"><text:span text:style-name="T79">M</text:span><text:span text:style-name="T80">2</text:span><text:span text:style-name="T79"> </text:span><text:span text:style-name="T79">&gt;</text:span><text:span text:style-name="T79"> </text:span><text:span text:style-name="T79">M</text:span><text:span text:style-name="T80">1</text:span></text:p></draw:text-box></draw:frame><draw:line draw:style-name="gr3" draw:text-style-name="P47" svg:x1="0.017cm" svg:y1="3.722cm" svg:x2="5.032cm" svg:y2="3.722cm"><text:p/></draw:line><draw:line draw:style-name="gr3" draw:text-style-name="P47" svg:x1="5.036cm" svg:y1="3.722cm" svg:x2="5.036cm" svg:y2="6.696cm"><text:p/></draw:line><draw:custom-shape draw:style-name="gr4" draw:text-style-name="P48" svg:width="5.016cm" svg:height="0.502cm" svg:x="0.018cm" svg:y="3.722cm"><text:p/><draw:enhanced-geometry svg:viewBox="0 0 21600 21600" draw:type="rectangle" draw:enhanced-path="M 0 0 L 21600 0 21600 21600 0 21600 0 0 Z N"/></draw:custom-shape><draw:custom-shape draw:style-name="gr5" draw:text-style-name="P48" svg:width="2.454cm" svg:height="0.653cm" draw:transform="rotate (-1.57515964992488) translate (5.03413888888889cm 4.24038888888889cm)"><text:p/><draw:enhanced-geometry svg:viewBox="0 0 21600 21600" draw:mirror-vertical="false" draw:mirror-horizontal="false" draw:type="rectangle" draw:enhanced-path="M 0 0 L 21600 0 21600 21600 0 21600 0 0 Z N"/></draw:custom-shape><draw:line draw:style-name="gr6" draw:text-style-name="P47" svg:x1="5.036cm" svg:y1="3.722cm" svg:x2="5.564cm" svg:y2="0.47cm"><text:p/></draw:line><draw:line draw:style-name="gr6" draw:text-style-name="P47" svg:x1="5.036cm" svg:y1="3.72cm" svg:x2="7.411cm" svg:y2="1.219cm"><text:p/></draw:line><draw:line draw:style-name="gr7" draw:text-style-name="P47" svg:x1="1.601cm" svg:y1="1.971cm" svg:x2="3.712cm" svg:y2="1.971cm"><text:p/></draw:line><draw:line draw:style-name="gr8" draw:text-style-name="P47" svg:x1="7.143cm" svg:y1="2.972cm" svg:x2="8.991cm" svg:y2="4.473cm"><text:p/></draw:line><draw:line draw:style-name="gr9" draw:text-style-name="P49" svg:x1="5.036cm" svg:y1="3.722cm" svg:x2="6.884cm" svg:y2="3.722cm"><text:p/></draw:line><draw:frame draw:style-name="gr10" draw:text-style-name="P46" svg:width="1.849cm" svg:height="0.659cm" svg:x="1.6cm" svg:y="1.326cm"><draw:text-box><text:p text:style-name="P45"><text:span text:style-name="T79">M</text:span><text:span text:style-name="T80">1</text:span><text:span text:style-name="T79"> </text:span><text:span text:style-name="T79">&gt;</text:span><text:span text:style-name="T79"> </text:span><text:span text:style-name="T79">1</text:span></text:p></draw:text-box></draw:frame><draw:frame draw:style-name="gr11" draw:text-style-name="P46" svg:width="1.848cm" svg:height="1.828cm" svg:x="5.825cm" svg:y="3.722cm"><draw:text-box><text:p text:style-name="P45"><text:span text:style-name="T81">δ</text:span><text:span text:style-name="T82">m</text:span><text:span text:style-name="T82">a</text:span><text:span text:style-name="T82">x</text:span></text:p></draw:text-box></draw:frame><draw:ellipse draw:style-name="gr12" draw:text-style-name="P50" svg:width="0.793cm" svg:height="1.001cm" svg:x="5.032cm" svg:y="3.258cm" draw:kind="arc" draw:start-angle="296.7" draw:end-angle="4.18"><text:p/></draw:ellipse><draw:line draw:style-name="gr13" draw:text-style-name="P47" svg:x1="5.036cm" svg:y1="3.692cm" svg:x2="6.62cm" svg:y2="5.193cm"><text:p/></draw:line></draw:g></text:p>
      <text:p text:style-name="P2"/>
      <text:p text:style-name="P2"/>
      <text:p text:style-name="P2"/>
      <text:p text:style-name="P2"/>
      <text:p text:style-name="P2"/>
      <text:p text:style-name="P2"><draw:frame draw:style-name="fr3" draw:name="Objeto11" text:anchor-type="as-char" svg:y="-0.319cm" svg:width="2.621cm" svg:height="0.473cm" draw:z-index="5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3"><text:span text:style-name="T18">Caso </text:span><text:span text:style-name="T20">Especial</text:span><text:span text:style-name="T18">: </text:span><text:span text:style-name="T46">Escoamento supersônico</text:span><text:span text:style-name="T21"> </text:span><text:span text:style-name="T46">p</text:span><text:span text:style-name="T47">ara encontrar o ângulo de expansão do escoamento (</text:span><text:span text:style-name="T3">ν</text:span><text:span text:style-name="T47">), </text:span><text:span text:style-name="T48">d</text:span><text:span text:style-name="T49">ado o valor do número de Mach </text:span><text:span text:style-name="T46">antes d</text:span><text:span text:style-name="T49">a expansão (</text:span><text:span text:style-name="T24">M</text:span><text:span text:style-name="T9">1</text:span><text:span text:style-name="T49">) </text:span><text:span text:style-name="T50">e pressões estáticas antes </text:span><text:span text:style-name="T51">(</text:span><text:span text:style-name="T23">P</text:span><text:span text:style-name="T10">1</text:span><text:span text:style-name="T51">)</text:span><text:span text:style-name="T50"> e depois </text:span><text:span text:style-name="T51">(</text:span><text:span text:style-name="T23">P</text:span><text:span text:style-name="T10">2</text:span><text:span text:style-name="T51">) </text:span><text:span text:style-name="T50">da expansão</text:span></text:p>
      <text:p text:style-name="P2"/>
      <text:p text:style-name="P2"><draw:g text:anchor-type="paragraph" draw:z-index="9" draw:name="Forma5" draw:style-name="gr1"><draw:frame draw:style-name="gr32" draw:text-style-name="P46" svg:width="1.751cm" svg:height="1.495cm" svg:x="7.733cm" svg:y="1.775cm"><draw:text-box><text:p text:style-name="P45"><text:span text:style-name="T79">M</text:span><text:span text:style-name="T80">2</text:span><text:span text:style-name="T79"> </text:span><text:span text:style-name="T79">&gt;</text:span><text:span text:style-name="T79"> </text:span><text:span text:style-name="T79">M</text:span><text:span text:style-name="T80">1</text:span></text:p><text:p text:style-name="P45"><text:span text:style-name="T85">P</text:span><text:span text:style-name="T80">2</text:span></text:p><text:p text:style-name="P45"><text:span text:style-name="T85">P</text:span><text:span text:style-name="T80">t</text:span><text:span text:style-name="T80">2</text:span><text:span text:style-name="T80"> </text:span><text:span text:style-name="T80">=</text:span><text:span text:style-name="T80"> </text:span><text:span text:style-name="T85">P</text:span><text:span text:style-name="T80">t</text:span><text:span text:style-name="T80">1</text:span></text:p></draw:text-box></draw:frame><draw:line draw:style-name="gr3" draw:text-style-name="P47" svg:x1="-0.018cm" svg:y1="3.297cm" svg:x2="4.733cm" svg:y2="3.297cm"><text:p/></draw:line><draw:line draw:style-name="gr3" draw:text-style-name="P47" svg:x1="4.729cm" svg:y1="3.297cm" svg:x2="4.729cm" svg:y2="6.258cm"><text:p/></draw:line><draw:custom-shape draw:style-name="gr33" draw:text-style-name="P48" svg:width="4.751cm" svg:height="0.5cm" svg:x="-0.018cm" svg:y="3.297cm"><text:p/><draw:enhanced-geometry svg:viewBox="0 0 21600 21600" draw:type="rectangle" draw:enhanced-path="M 0 0 L 21600 0 21600 21600 0 21600 0 0 Z N"/></draw:custom-shape><draw:custom-shape draw:style-name="gr34" draw:text-style-name="P48" svg:width="2.444cm" svg:height="0.618cm" draw:transform="rotate (-1.57515964992488) translate (4.72898611111111cm 3.81529166666667cm)"><text:p/><draw:enhanced-geometry svg:viewBox="0 0 21600 21600" draw:mirror-vertical="false" draw:mirror-horizontal="false" draw:type="rectangle" draw:enhanced-path="M 0 0 L 21600 0 21600 21600 0 21600 0 0 Z N"/></draw:custom-shape><draw:line draw:style-name="gr6" draw:text-style-name="P47" svg:x1="4.729cm" svg:y1="3.297cm" svg:x2="5.229cm" svg:y2="0.031cm"><text:p/></draw:line><draw:line draw:style-name="gr6" draw:text-style-name="P47" svg:x1="4.729cm" svg:y1="3.297cm" svg:x2="6.979cm" svg:y2="0.806cm"><text:p/></draw:line><draw:line draw:style-name="gr7" draw:text-style-name="P47" svg:x1="1.48cm" svg:y1="1.553cm" svg:x2="3.48cm" svg:y2="1.553cm"><text:p/></draw:line><draw:line draw:style-name="gr8" draw:text-style-name="P47" svg:x1="6.731cm" svg:y1="2.55cm" svg:x2="8.481cm" svg:y2="4.044cm"><text:p/></draw:line><draw:line draw:style-name="gr9" draw:text-style-name="P49" svg:x1="4.729cm" svg:y1="3.297cm" svg:x2="6.479cm" svg:y2="3.297cm"><text:p/></draw:line><draw:frame draw:style-name="gr35" draw:text-style-name="P46" svg:width="1.751cm" svg:height="1.47cm" svg:x="1.732cm" svg:y="0.097cm"><draw:text-box><text:p text:style-name="P45"><text:span text:style-name="T79">M</text:span><text:span text:style-name="T80">1</text:span><text:span text:style-name="T79"> </text:span><text:span text:style-name="T79">&gt;</text:span><text:span text:style-name="T79"> </text:span><text:span text:style-name="T79">1</text:span></text:p><text:p text:style-name="P45"><text:span text:style-name="T79">P</text:span><text:span text:style-name="T80">1</text:span></text:p><text:p text:style-name="P45"><text:span text:style-name="T79">P</text:span><text:span text:style-name="T80">t</text:span><text:span text:style-name="T80">1</text:span></text:p></draw:text-box></draw:frame><draw:frame draw:style-name="gr36" draw:text-style-name="P46" svg:width="1.752cm" svg:height="1.821cm" svg:x="5.482cm" svg:y="3.297cm"><draw:text-box><text:p text:style-name="P45"><text:span text:style-name="T81">δ</text:span></text:p></draw:text-box></draw:frame><draw:ellipse draw:style-name="gr12" draw:text-style-name="P50" svg:width="0.75cm" svg:height="0.997cm" svg:x="4.732cm" svg:y="2.835cm" draw:kind="arc" draw:start-angle="296.7" draw:end-angle="4.18"><text:p/></draw:ellipse><draw:line draw:style-name="gr13" draw:text-style-name="P47" svg:x1="4.729cm" svg:y1="3.272cm" svg:x2="6.229cm" svg:y2="4.766cm"><text:p/></draw:line></draw:g></text:p>
      <text:p text:style-name="P2"/>
      <text:p text:style-name="P6"/>
      <text:p text:style-name="P6"><draw:frame draw:style-name="fr3" draw:name="Objeto13" text:anchor-type="as-char" svg:y="-0.711cm" svg:width="4.863cm" svg:height="1.139cm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2"><draw:frame draw:style-name="fr3" draw:name="Objeto14" text:anchor-type="as-char" svg:y="-0.917cm" svg:width="5.115cm" svg:height="1.478cm" draw:z-index="7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2"/>
      <text:p text:style-name="P2"><draw:frame draw:style-name="fr3" draw:name="Objeto3" text:anchor-type="as-char" svg:y="-0.319cm" svg:width="1.907cm" svg:height="0.473cm" draw:z-index="16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"/>
      <text:p text:style-name="P2"/>
      <text:p text:style-name="P2"/>
      <text:p text:style-name="P2"/>
      <text:p text:style-name="P44"><text:span text:style-name="T77">1) </text:span><text:span text:style-name="T76">Construa um gráfico de ângulo de expansão sônica em funcão de Macha jusante, usando o modelo de expansão de Prandtl -Meyer, </text:span><text:span text:style-name="T78">gama igual a 1,4.</text:span></text:p>
      <text:p text:style-name="P38"><draw:frame draw:style-name="fr1" draw:name="Figura2" text:anchor-type="char" svg:x="8.673cm" svg:y="0.102cm" svg:width="9.521cm" svg:height="8.341cm" draw:z-index="21"><draw:image xlink:href="Pictures/10002D2F00004F7A00003BA22E013147D4510290.svg" xlink:type="simple" xlink:show="embed" xlink:actuate="onLoad" draw:mime-type="image/svg+xml"/><draw:image xlink:href="Pictures/100002010000030100000241760A638759D1988D.png" xlink:type="simple" xlink:show="embed" xlink:actuate="onLoad" draw:mime-type="image/png"/></draw:frame></text:p>
      <text:p text:style-name="P40">clc;</text:p>
      <text:p text:style-name="P40">clearvars;</text:p>
      <text:p text:style-name="P40"/>
      <text:p text:style-name="P40">gamma = 1.4;</text:p>
      <text:p text:style-name="P40">M = 1:0.1:6;</text:p>
      <text:p text:style-name="P40">for i = 1:51</text:p>
      <text:p text:style-name="P40"><text:s text:c="2"/>nu(i) = <text:s/>GetSonicExpansionAngle(gamma,M(i));</text:p>
      <text:p text:style-name="P41"><text:s text:c="2"/>nu(i) = -rad2deg(nu(i));</text:p>
      <text:p text:style-name="P41">endfor</text:p>
      <text:p text:style-name="P40"/>
      <text:p text:style-name="P40">figure (1);</text:p>
      <text:p text:style-name="P40">plot(M,nu);</text:p>
      <text:p text:style-name="P40">xlabel("Mach after expansion");</text:p>
      <text:p text:style-name="P40">ylabel("Expansion Angle (degrees)");</text:p>
      <text:p text:style-name="P40">grid;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pan text:style-name="T68">2) </text:span><text:span text:style-name="T69">Construa um gráfico de ângulo </text:span><text:span text:style-name="T68">máximo </text:span><text:span text:style-name="T69">de expansão </text:span><text:span text:style-name="T68">super</text:span><text:span text:style-name="T69">sônica em funcão de Mach a </text:span><text:span text:style-name="T68">montante</text:span><text:span text:style-name="T69">, usando o modelo de expansão de Prandtl-Meyer, </text:span><text:span text:style-name="T70">gama igual a 1,4.</text:span></text:p>
      <text:p text:style-name="P41"><draw:frame draw:style-name="fr1" draw:name="Figura3" text:anchor-type="char" svg:x="7.698cm" svg:y="0.132cm" svg:width="10.702cm" svg:height="8.029cm" draw:z-index="22"><draw:image xlink:href="Pictures/10002D4600004F7A00003BA25CD61F15D779F285.svg" xlink:type="simple" xlink:show="embed" xlink:actuate="onLoad" draw:mime-type="image/svg+xml"/><draw:image xlink:href="Pictures/10000201000003010000024180D6C59D1CBADD3A.png" xlink:type="simple" xlink:show="embed" xlink:actuate="onLoad" draw:mime-type="image/png"/></draw:frame></text:p>
      <text:p text:style-name="P41">clc;</text:p>
      <text:p text:style-name="P41">clearvars;</text:p>
      <text:p text:style-name="P41"/>
      <text:p text:style-name="P41">gamma = 1.4;</text:p>
      <text:p text:style-name="P41">M = 1:0.1:6;</text:p>
      <text:p text:style-name="P41">for i = 1:51</text:p>
      <text:p text:style-name="P41"><text:s text:c="2"/>nuMax(i) = GetMaxExpansionAngle(gamma,M(i));</text:p>
      <text:p text:style-name="P41"><text:s text:c="2"/>nuMax(i) = -rad2deg(nuMax(i));</text:p>
      <text:p text:style-name="P41">endfor</text:p>
      <text:p text:style-name="P41"/>
      <text:p text:style-name="P39"><text:span text:style-name="T62">figure(</text:span><text:span text:style-name="T66">1</text:span><text:span text:style-name="T62">);</text:span></text:p>
      <text:p text:style-name="P41">plot(M,nuMax);</text:p>
      <text:p text:style-name="P41">xlabel("Mach before expansion");</text:p>
      <text:p text:style-name="P41">ylabel("Expansion Angle (degrees)");</text:p>
      <text:p text:style-name="P41"><text:span text:style-name="T65">grid;</text:span></text:p>
      <text:p text:style-name="P36"><draw:frame draw:style-name="fr2" draw:name="Figura1" text:anchor-type="char" svg:x="2.305cm" svg:y="0.205cm" svg:width="11.809cm" svg:height="10.793cm" draw:z-index="12"><draw:image xlink:href="Pictures/10000201000001E8000001BEE59B6706939AE59D.png" xlink:type="simple" xlink:show="embed" xlink:actuate="onLoad" draw:mime-type="image/png"/></draw:frame></text:p>
      <text:p text:style-name="P43"><text:span text:style-name="T77">3) </text:span><text:span text:style-name="T78">Calcular o ângulo de expansão na saída da tubeira do </text:span><text:span text:style-name="T11">Motor Merlim Vacuum, Segundo Estágio, Lançador Falcon 9</text:span>, <text:span text:style-name="T78">considerando um expansão máxima para pressão igual a zero e considerando a pressão atmosférica a 80 km de altitude geométrica.</text:span></text:p>
      <text:p text:style-name="P34"/>
      <text:p text:style-name="P25"><text:span text:style-name="T53">Ae_</text:span><text:span text:style-name="T54">A</text:span><text:span text:style-name="T53">t = 1</text:span><text:span text:style-name="T56">2</text:span><text:span text:style-name="T53">0; <text:s text:c="5"/>% </text:span><text:span text:style-name="T55">Razão entre a área de saída da tubeira e a área da garganta</text:span></text:p>
      <text:p text:style-name="P29"><text:span text:style-name="T29">gama = 1.</text:span><text:span text:style-name="T33">217</text:span><text:span text:style-name="T30">; <text:s text:c="3"/>% </text:span><text:span text:style-name="T31">Razão dos calores específicos do gás de exaustão do motor</text:span></text:p>
      <text:p text:style-name="P16"><text:span text:style-name="T57">Me = </text:span><text:span text:style-name="T58">GetMachFromA_Astar(</text:span><text:span text:style-name="T59">gama</text:span><text:span text:style-name="T58">, </text:span><text:span text:style-name="T59">Ae_At</text:span><text:span text:style-name="T58">, </text:span><text:span text:style-name="T59">2</text:span><text:span text:style-name="T58">) <text:s text:c="3"/></text:span><text:span text:style-name="T60">% </text:span><text:span text:style-name="T61">Número de </text:span><text:span text:style-name="T60">Mach na seção de saída da tubeira</text:span></text:p>
      <text:p text:style-name="P31"><text:span text:style-name="T25">Pt1 = </text:span><text:span text:style-name="T32">97</text:span><text:span text:style-name="T26">e5; <text:s text:c="4"/>% </text:span><text:span text:style-name="T27">Pressão total do escoamento do motor (pressão na câmara de combustão <text:s/>do motor), </text:span><text:span text:style-name="T28">em </text:span><text:span text:style-name="T26">Pa</text:span></text:p>
      <text:p text:style-name="P30"><text:span text:style-name="T25">P1 = </text:span><text:span text:style-name="T35">Pt1/</text:span><text:span text:style-name="T34">Get</text:span><text:span text:style-name="T35">Pt_P(gama,Me)</text:span><text:span text:style-name="T25"> <text:s text:c="6"/>% </text:span><text:span text:style-name="T31">Pressão estática na saída da tubeira do motor</text:span></text:p>
      <text:p text:style-name="P23"/>
      <text:p text:style-name="P24">Então, <text:s/>Me = <text:s/>5.1733 <text:s text:c="3"/>P1 = <text:s/>4672.6 <text:span text:style-name="T75">Pa</text:span></text:p>
      <text:p text:style-name="P15"/>
      <text:p text:style-name="P14"><text:span text:style-name="T53">Para uma a</text:span><text:span text:style-name="T52">ltitude de 155 km, </text:span><text:span text:style-name="T53">Atmosfera USA</text:span></text:p>
      <text:p text:style-name="P21">P = 0</text:p>
      <text:p text:style-name="P22">P<text:span text:style-name="T4">2</text:span> = 0</text:p>
      <text:p text:style-name="P22"/>
      <text:p text:style-name="P26"><text:span text:style-name="T71">ExpansionAngle = -rad2deg(</text:span>GetMaxExpansionAngle(gama,M<text:span text:style-name="T71">e</text:span>)<text:span text:style-name="T71">)</text:span></text:p>
      <text:p text:style-name="P26"/>
      <text:p text:style-name="P18"><text:span text:style-name="T72">Então, </text:span><text:span text:style-name="T74">Máximo </text:span><text:span text:style-name="T72">Ângulo de expansão </text:span><text:span text:style-name="T74">para acima de 100 km de altitude </text:span><text:span text:style-name="T72">= <text:s/>9</text:span><text:span text:style-name="T73">2 </text:span><text:span text:style-name="T72">graus</text:span></text:p>
      <text:p text:style-name="P17"/>
      <text:p text:style-name="P20"><text:span text:style-name="T53">Para uma a</text:span>ltitude de 80 km, <text:span text:style-name="T53">Atmosfera USA</text:span></text:p>
      <text:p text:style-name="P20">P = 1 Pa</text:p>
      <text:p text:style-name="P22">P<text:span text:style-name="T4">2</text:span> = 1 Pa</text:p>
      <text:p text:style-name="P10"/>
      <text:p text:style-name="P28">P2 = 1; <text:s text:c="15"/>% Pressão atmosférica local a 80 km de altitude</text:p>
      <text:p text:style-name="P10"><text:span text:style-name="T62">ExpansionAngle = -</text:span><text:span text:style-name="T63">rad2deg(</text:span><text:span text:style-name="T62">GetSupersonicExpansionAngleFromP2_P1(gama,</text:span><text:span text:style-name="T63">Me</text:span><text:span text:style-name="T62">,</text:span><text:span text:style-name="T63">P1</text:span><text:span text:style-name="T62">,</text:span><text:span text:style-name="T63">P2</text:span><text:span text:style-name="T62">)</text:span><text:span text:style-name="T63">)</text:span></text:p>
      <text:p text:style-name="P27"/>
      <text:p text:style-name="P18"><text:span text:style-name="T72">Então, Ângulo de expansão </text:span><text:span text:style-name="T74">para 80 km de altitude</text:span><text:span text:style-name="T72"> = </text:span><text:span text:style-name="T73">50</text:span><text:span text:style-name="T72"> gra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erif CJK SC" svg:font-family="'Noto Serif CJK S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draw:hatch draw:name="Blue_20_-45_20_Degrees" draw:display-name="Blue -45 Degrees" draw:style="single" draw:color="#2a6099" draw:distance="0.115cm" draw:rotation="3150"/>
    <draw:hatch draw:name="Blue_20_45_20_Degrees" draw:display-name="Blue 45 Degrees" draw:style="single" draw:color="#2a6099" draw:distance="0.115cm" draw:rotation="450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stroke-dash draw:name="Dash" draw:style="rect" draw:dots1="1" draw:dots1-length="17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4T15:58:19.092994176</meta:creation-date>
    <dc:date>2020-10-27T15:59:31.268976464</dc:date>
    <meta:editing-duration>PT6H24M43S</meta:editing-duration>
    <meta:editing-cycles>76</meta:editing-cycles>
    <meta:generator>LibreOffice/7.0.1.2$Linux_X86_64 LibreOffice_project/00$Build-2</meta:generator>
    <meta:print-date>2020-10-25T16:36:18.921624681</meta:print-date>
    <meta:document-statistic meta:table-count="0" meta:image-count="3" meta:object-count="15" meta:page-count="5" meta:paragraph-count="68" meta:word-count="469" meta:character-count="2915" meta:non-whitespace-character-count="2442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row>
          <msup>
            <msub>
              <mi>M</mi>
              <mn>2</mn>
            </msub>
            <mn>2</mn>
          </msup>
          <mo stretchy="false">−</mo>
          <mn>1</mn>
        </mrow>
      </msqrt>
    </mrow>
    <annotation encoding="StarMath 5.0">c= sqrt{{M sub 2 } sup 2 -1} </annotation>
  </semantics>
</math>
</file>

<file path=Object 10/content.xml><?xml version="1.0" encoding="utf-8"?>
<math xmlns="http://www.w3.org/1998/Math/MathML" display="block">
  <semantics>
    <mrow>
      <mrow>
        <msub>
          <mi>ν</mi>
          <mi mathvariant="italic">max</mi>
        </msub>
        <mo stretchy="false">=</mo>
        <mfrac>
          <mi>π</mi>
          <mn>2</mn>
        </mfrac>
      </mrow>
      <mrow>
        <mo fence="true" stretchy="false">(</mo>
        <mrow>
          <mrow>
            <msqrt>
              <mi>b</mi>
            </msqrt>
            <mo stretchy="false">−</mo>
            <mn>1</mn>
          </mrow>
        </mrow>
        <mo fence="true" stretchy="false">)</mo>
      </mrow>
    </mrow>
    <annotation encoding="StarMath 5.0"> %nu sub max  =  %pi over 2 (sqrt{b}-1)</annotation>
  </semantics>
</math>
</file>

<file path=Object 11/content.xml><?xml version="1.0" encoding="utf-8"?>
<math xmlns="http://www.w3.org/1998/Math/MathML" display="block">
  <semantics>
    <mrow>
      <msub>
        <mi>δ</mi>
        <mi mathvariant="italic">max</mi>
      </msub>
      <mo stretchy="false">=</mo>
      <mrow>
        <msub>
          <mi>ν</mi>
          <mi mathvariant="italic">max</mi>
        </msub>
        <mo stretchy="false">−</mo>
        <msub>
          <mi>ν</mi>
          <mn>1</mn>
        </msub>
      </mrow>
    </mrow>
    <annotation encoding="StarMath 5.0">%delta sub max = %nu sub max - %nu sub 1</annotation>
  </semantics>
</math>
</file>

<file path=Object 13/content.xml><?xml version="1.0" encoding="utf-8"?>
<math xmlns="http://www.w3.org/1998/Math/MathML" display="block">
  <semantics>
    <mrow>
      <mrow>
        <msub>
          <mi>P</mi>
          <mrow>
            <mi>t</mi>
            <mn>1</mn>
          </mrow>
        </msub>
        <mo stretchy="false">=</mo>
        <msub>
          <mi>P</mi>
          <mn>1</mn>
        </msub>
      </mrow>
      <msup>
        <mrow>
          <mo fence="true" stretchy="true">[</mo>
          <mrow>
            <mrow>
              <mrow>
                <mn>1</mn>
                <mo stretchy="false">+</mo>
                <mfrac>
                  <mrow>
                    <mo fence="true" stretchy="false">(</mo>
                    <mrow>
                      <mrow>
                        <mi>γ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frac>
              </mrow>
              <msubsup>
                <mi>M</mi>
                <mn>1</mn>
                <mn>2</mn>
              </msubsup>
            </mrow>
          </mrow>
          <mo fence="true" stretchy="true">]</mo>
        </mrow>
        <mfrac>
          <mi>γ</mi>
          <mrow>
            <mo fence="true" stretchy="false">(</mo>
            <mrow>
              <mrow>
                <mi>γ</mi>
                <mo stretchy="false">−</mo>
                <mn>1</mn>
              </mrow>
            </mrow>
            <mo fence="true" stretchy="false">)</mo>
          </mrow>
        </mfrac>
      </msup>
    </mrow>
    <annotation encoding="StarMath 5.0">P sub t1 = P sub 1 left[ 1+ (%gamma -1)over 2 M sub 1 sup 2 right] sup { %gamma over (%gamma-1) }</annotation>
  </semantics>
</math>
</file>

<file path=Object 14/content.xml><?xml version="1.0" encoding="utf-8"?>
<math xmlns="http://www.w3.org/1998/Math/MathML" display="block">
  <semantics>
    <mrow>
      <msub>
        <mi>M</mi>
        <mn>2</mn>
      </msub>
      <mo stretchy="false">=</mo>
      <msqrt>
        <mrow>
          <mfrac>
            <mn>2</mn>
            <mrow>
              <mo fence="true" stretchy="false">(</mo>
              <mrow>
                <mrow>
                  <mi>γ</mi>
                  <mo stretchy="false">−</mo>
                  <mn>1</mn>
                </mrow>
              </mrow>
              <mo fence="true" stretchy="false">)</mo>
            </mrow>
          </mfrac>
          <mrow>
            <mo fence="true" stretchy="true">[</mo>
            <mrow>
              <mrow>
                <msup>
                  <mrow>
                    <mo fence="true" stretchy="true">(</mo>
                    <mrow>
                      <mfrac>
                        <msub>
                          <mi>P</mi>
                          <mrow>
                            <mi>t</mi>
                            <mn>1</mn>
                          </mrow>
                        </msub>
                        <msub>
                          <mi>P</mi>
                          <mn>2</mn>
                        </msub>
                      </mfrac>
                    </mrow>
                    <mo fence="true" stretchy="true">)</mo>
                  </mrow>
                  <mfrac>
                    <mi>γ</mi>
                    <mrow>
                      <mo fence="true" stretchy="false">(</mo>
                      <mrow>
                        <mrow>
                          <mi>γ</mi>
                          <mo stretchy="false">−</mo>
                          <mn>1</mn>
                        </mrow>
                      </mrow>
                      <mo fence="true" stretchy="false">)</mo>
                    </mrow>
                  </mfrac>
                </msup>
                <mo stretchy="false">−</mo>
                <mn>1</mn>
              </mrow>
            </mrow>
            <mo fence="true" stretchy="true">]</mo>
          </mrow>
        </mrow>
      </msqrt>
    </mrow>
    <annotation encoding="StarMath 5.0">M sub 2 = sqrt{2 over (%gamma -1)  left[ left(P sub t1 over P sub 2 right) sup { %gamma over (%gamma-1) } -1 right]} </annotation>
  </semantics>
</math>
</file>

<file path=Object 15/content.xml><?xml version="1.0" encoding="utf-8"?>
<math xmlns="http://www.w3.org/1998/Math/MathML" display="block">
  <semantics>
    <mrow>
      <mrow>
        <mfrac>
          <mrow>
            <mi>d</mi>
            <mi>arctan</mi>
            <mrow>
              <mo fence="true" stretchy="true">(</mo>
              <mrow>
                <mfrac>
                  <mi>c</mi>
                  <msqrt>
                    <mi>b</mi>
                  </msqrt>
                </mfrac>
              </mrow>
              <mo fence="true" stretchy="true">)</mo>
            </mrow>
          </mrow>
          <msub>
            <mi mathvariant="italic">dM</mi>
            <mn>2</mn>
          </msub>
        </mfrac>
        <mo stretchy="false">=</mo>
        <mfrac>
          <mn>1</mn>
          <mrow>
            <mn>1</mn>
            <mo stretchy="false">+</mo>
            <msup>
              <mrow>
                <mo fence="true" stretchy="true">(</mo>
                <mrow>
                  <mfrac>
                    <mi>c</mi>
                    <msqrt>
                      <mi>b</mi>
                    </msqrt>
                  </mfrac>
                </mrow>
                <mo fence="true" stretchy="true">)</mo>
              </mrow>
              <mn>2</mn>
            </msup>
          </mrow>
        </mfrac>
      </mrow>
      <mfrac>
        <mi mathvariant="italic">dc</mi>
        <msub>
          <mi mathvariant="italic">dM</mi>
          <mn>2</mn>
        </msub>
      </mfrac>
      <mrow>
        <mfrac>
          <mn>1</mn>
          <msqrt>
            <mi>b</mi>
          </msqrt>
        </mfrac>
        <mo stretchy="false">=</mo>
        <mfrac>
          <msqrt>
            <mi>b</mi>
          </msqrt>
          <mrow>
            <mo fence="true" stretchy="false">(</mo>
            <mrow>
              <mrow>
                <mi>b</mi>
                <mo stretchy="false">+</mo>
                <msup>
                  <mi>c</mi>
                  <mn>2</mn>
                </msup>
              </mrow>
            </mrow>
            <mo fence="true" stretchy="false">)</mo>
          </mrow>
        </mfrac>
      </mrow>
      <mfrac>
        <msub>
          <mi>M</mi>
          <mn>2</mn>
        </msub>
        <mi>c</mi>
      </mfrac>
    </mrow>
    <annotation encoding="StarMath 5.0">{d arctan { left( c over sqrt{b} right) }} over dM sub 2 = {1} over { 1 + { left( c over sqrt{b} right)} sup 2 } dc over dM sub 2 1 over sqrt{b} = sqrt{b} over (b + c sup 2 ) M sub 2 over c</annotation>
  </semantics>
</math>
</file>

<file path=Object 16/content.xml><?xml version="1.0" encoding="utf-8"?>
<math xmlns="http://www.w3.org/1998/Math/MathML" display="block">
  <semantics>
    <mrow>
      <mrow>
        <mfrac>
          <mi mathvariant="italic">dc</mi>
          <msub>
            <mi mathvariant="italic">dM</mi>
            <mn>2</mn>
          </msub>
        </mfrac>
        <mo stretchy="false">=</mo>
        <mfrac>
          <mn>1</mn>
          <mn>2</mn>
        </mfrac>
      </mrow>
      <msup>
        <mrow>
          <mo fence="true" stretchy="false">(</mo>
          <mrow>
            <mrow>
              <msubsup>
                <mi>M</mi>
                <mn>2</mn>
                <mn>2</mn>
              </msubsup>
              <mo stretchy="false">−</mo>
              <mn>1</mn>
            </mrow>
          </mrow>
          <mo fence="true" stretchy="false">)</mo>
        </mrow>
        <mrow>
          <mfrac>
            <mn>1</mn>
            <mn>2</mn>
          </mfrac>
          <mo stretchy="false">−</mo>
          <mn>1</mn>
        </mrow>
      </msup>
      <mn>2</mn>
      <mrow>
        <msub>
          <mi>M</mi>
          <mn>2</mn>
        </msub>
        <mo stretchy="false">=</mo>
        <mfrac>
          <msub>
            <mi>M</mi>
            <mn>2</mn>
          </msub>
          <msqrt>
            <mrow>
              <msubsup>
                <mi>M</mi>
                <mn>2</mn>
                <mn>2</mn>
              </msubsup>
              <mo stretchy="false">−</mo>
              <mn>1</mn>
            </mrow>
          </msqrt>
        </mfrac>
        <mo stretchy="false">=</mo>
        <mfrac>
          <msub>
            <mi>M</mi>
            <mn>2</mn>
          </msub>
          <mi>c</mi>
        </mfrac>
      </mrow>
    </mrow>
    <annotation encoding="StarMath 5.0">dc over dM sub 2= 1 over 2 (M sub 2sup 2 -1) sup {1 over 2 -1} 2 M sub 2 = M sub 2 over { sqrt{M sub 2 sup 2 -1}  } = M sub 2 over c</annotation>
  </semantics>
</math>
</file>

<file path=Object 17/content.xml><?xml version="1.0" encoding="utf-8"?>
<math xmlns="http://www.w3.org/1998/Math/MathML" display="block">
  <semantics>
    <mrow>
      <mrow>
        <mfrac>
          <mrow>
            <mi>d</mi>
            <mi>arctan</mi>
            <mi>c</mi>
          </mrow>
          <msub>
            <mi mathvariant="italic">dM</mi>
            <mn>2</mn>
          </msub>
        </mfrac>
        <mo stretchy="false">=</mo>
        <mfrac>
          <mn>1</mn>
          <mrow>
            <mn>1</mn>
            <mo stretchy="false">+</mo>
            <msup>
              <mi>c</mi>
              <mn>2</mn>
            </msup>
          </mrow>
        </mfrac>
      </mrow>
      <mrow>
        <mfrac>
          <mi mathvariant="italic">dc</mi>
          <msub>
            <mi mathvariant="italic">dM</mi>
            <mn>2</mn>
          </msub>
        </mfrac>
        <mo stretchy="false">=</mo>
        <mfrac>
          <mn>1</mn>
          <mrow>
            <mo fence="true" stretchy="false">(</mo>
            <mrow>
              <mrow>
                <mn>1</mn>
                <mo stretchy="false">+</mo>
                <msup>
                  <mi>c</mi>
                  <mn>2</mn>
                </msup>
              </mrow>
            </mrow>
            <mo fence="true" stretchy="false">)</mo>
          </mrow>
        </mfrac>
      </mrow>
      <mfrac>
        <msub>
          <mi>M</mi>
          <mn>2</mn>
        </msub>
        <mi>c</mi>
      </mfrac>
    </mrow>
    <annotation encoding="StarMath 5.0">{d arctan c} over dM sub 2= {1} over { 1 + c sup 2 } dc over dM sub 2 = { 1 over (1 + c sup 2) } M sub 2 over c </annotation>
  </semantics>
</math>
</file>

<file path=Object 2/content.xml><?xml version="1.0" encoding="utf-8"?>
<math xmlns="http://www.w3.org/1998/Math/MathML" display="block">
  <semantics>
    <mrow>
      <mi>δ</mi>
      <mo stretchy="false">=</mo>
      <mrow>
        <msub>
          <mi>ν</mi>
          <mn>2</mn>
        </msub>
        <mo stretchy="false">−</mo>
        <msub>
          <mi>ν</mi>
          <mn>1</mn>
        </msub>
      </mrow>
    </mrow>
    <annotation encoding="StarMath 5.0">%delta  = %nu sub 2 - %nu sub 1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row>
          <mi>γ</mi>
          <mo stretchy="false">+</mo>
          <mn>1</mn>
        </mrow>
        <mrow>
          <mi>γ</mi>
          <mo stretchy="false">−</mo>
          <mn>1</mn>
        </mrow>
      </mfrac>
    </mrow>
    <annotation encoding="StarMath 5.0">b = { %gamma + 1 } over {%gamma - 1 }</annotation>
  </semantics>
</math>
</file>

<file path=Object 4/content.xml><?xml version="1.0" encoding="utf-8"?>
<math xmlns="http://www.w3.org/1998/Math/MathML" display="block">
  <semantics>
    <mrow>
      <mi>δ</mi>
      <mo stretchy="false">=</mo>
      <mrow>
        <msub>
          <mi>ν</mi>
          <mn>2</mn>
        </msub>
        <mo stretchy="false">−</mo>
        <msub>
          <mi>ν</mi>
          <mn>1</mn>
        </msub>
      </mrow>
    </mrow>
    <annotation encoding="StarMath 5.0">%delta  = %nu sub 2 - %nu sub 1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row>
          <mi>ν</mi>
          <mo stretchy="false">+</mo>
          <msqrt>
            <mi>b</mi>
          </msqrt>
        </mrow>
      </mrow>
      <mi>arctan</mi>
      <mrow>
        <mrow>
          <mo fence="true" stretchy="true">(</mo>
          <mrow>
            <mfrac>
              <mi>c</mi>
              <msqrt>
                <mi>b</mi>
              </msqrt>
            </mfrac>
          </mrow>
          <mo fence="true" stretchy="true">)</mo>
        </mrow>
        <mo stretchy="false">−</mo>
        <mi>arctan</mi>
      </mrow>
      <mrow>
        <mrow>
          <mo fence="true" stretchy="false">(</mo>
          <mrow>
            <mi>c</mi>
          </mrow>
          <mo fence="true" stretchy="false">)</mo>
        </mrow>
        <mo stretchy="false">=</mo>
        <mn>0</mn>
      </mrow>
    </mrow>
    <annotation encoding="StarMath 5.0">F = %nu + sqrt{b} arctan left(c over sqrt{b} right) - arctan(c) = 0</annotation>
  </semantics>
</math>
</file>

<file path=Object 6/content.xml><?xml version="1.0" encoding="utf-8"?>
<math xmlns="http://www.w3.org/1998/Math/MathML" display="block">
  <semantics>
    <mrow>
      <mrow>
        <mfrac>
          <mi mathvariant="italic">dF</mi>
          <msub>
            <mi mathvariant="italic">dM</mi>
            <mn>2</mn>
          </msub>
        </mfrac>
        <mo stretchy="false">=</mo>
        <msqrt>
          <mi>b</mi>
        </msqrt>
      </mrow>
      <mfrac>
        <msqrt>
          <mi>b</mi>
        </msqrt>
        <mrow>
          <mo fence="true" stretchy="false">(</mo>
          <mrow>
            <mrow>
              <mi>b</mi>
              <mo stretchy="false">+</mo>
              <msup>
                <mi>c</mi>
                <mn>2</mn>
              </msup>
            </mrow>
          </mrow>
          <mo fence="true" stretchy="false">)</mo>
        </mrow>
      </mfrac>
      <mrow>
        <mrow>
          <mfrac>
            <msub>
              <mi>M</mi>
              <mn>2</mn>
            </msub>
            <mi>c</mi>
          </mfrac>
          <mo stretchy="false">−</mo>
          <mfrac>
            <msub>
              <mi>M</mi>
              <mn>2</mn>
            </msub>
            <mrow>
              <mi>c</mi>
              <mrow>
                <mo fence="true" stretchy="false">(</mo>
                <mrow>
                  <mrow>
                    <mn>1</mn>
                    <mo stretchy="false">+</mo>
                    <msup>
                      <mi>c</mi>
                      <mn>2</mn>
                    </msup>
                  </mrow>
                </mrow>
                <mo fence="true" stretchy="false">)</mo>
              </mrow>
            </mrow>
          </mfrac>
        </mrow>
        <mo stretchy="false">=</mo>
        <mfrac>
          <mi>b</mi>
          <mrow>
            <mo fence="true" stretchy="false">(</mo>
            <mrow>
              <mrow>
                <mi>b</mi>
                <mo stretchy="false">+</mo>
                <msup>
                  <mi>c</mi>
                  <mn>2</mn>
                </msup>
              </mrow>
            </mrow>
            <mo fence="true" stretchy="false">)</mo>
          </mrow>
        </mfrac>
      </mrow>
      <mrow>
        <mfrac>
          <msub>
            <mi>M</mi>
            <mn>2</mn>
          </msub>
          <mi>c</mi>
        </mfrac>
        <mo stretchy="false">−</mo>
        <mfrac>
          <mn>1</mn>
          <mrow>
            <mo fence="true" stretchy="false">(</mo>
            <mrow>
              <mrow>
                <mn>1</mn>
                <mo stretchy="false">+</mo>
                <msup>
                  <mi>c</mi>
                  <mn>2</mn>
                </msup>
              </mrow>
            </mrow>
            <mo fence="true" stretchy="false">)</mo>
          </mrow>
        </mfrac>
      </mrow>
      <mrow>
        <mfrac>
          <msub>
            <mi>M</mi>
            <mn>2</mn>
          </msub>
          <mi>c</mi>
        </mfrac>
        <mo stretchy="false">=</mo>
        <mrow>
          <mo fence="true" stretchy="true">[</mo>
          <mrow>
            <mrow>
              <mfrac>
                <mi>b</mi>
                <mrow>
                  <mo fence="true" stretchy="false">(</mo>
                  <mrow>
                    <mrow>
                      <mi>b</mi>
                      <mo stretchy="false">+</mo>
                      <msup>
                        <mi>c</mi>
                        <mn>2</mn>
                      </msup>
                    </mrow>
                  </mrow>
                  <mo fence="true" stretchy="false">)</mo>
                </mrow>
              </mfrac>
              <mo stretchy="false">−</mo>
              <mfrac>
                <mn>1</mn>
                <mrow>
                  <mo fence="true" stretchy="false">(</mo>
                  <mrow>
                    <mrow>
                      <mn>1</mn>
                      <mo stretchy="false">+</mo>
                      <msup>
                        <mi>c</mi>
                        <mn>2</mn>
                      </msup>
                    </mrow>
                  </mrow>
                  <mo fence="true" stretchy="false">)</mo>
                </mrow>
              </mfrac>
            </mrow>
          </mrow>
          <mo fence="true" stretchy="true">]</mo>
        </mrow>
      </mrow>
      <mfrac>
        <msub>
          <mi>M</mi>
          <mn>2</mn>
        </msub>
        <mi>c</mi>
      </mfrac>
    </mrow>
    <annotation encoding="StarMath 5.0">dF over dM sub 2= sqrt{b} sqrt{b} over (b + c sup 2 ) M sub 2 over c - M sub 2over { c (1 + c sup 2) } = b over (b + c sup 2 ) M sub 2over c - { 1 over (1 + c sup 2) } M sub 2 over c = left[ { b over (b + c sup 2 ) - { 1 over (1 + c sup 2) }} right] M sub 2 over c</annotation>
  </semantics>
</math>
</file>

<file path=Object 7/content.xml><?xml version="1.0" encoding="utf-8"?>
<math xmlns="http://www.w3.org/1998/Math/MathML" display="block">
  <semantics>
    <mrow>
      <msubsup>
        <mi>M</mi>
        <mn>2</mn>
        <mrow>
          <mi>i</mi>
          <mo stretchy="false">+</mo>
          <mn>1</mn>
        </mrow>
      </msubsup>
      <mo stretchy="false">=</mo>
      <mrow>
        <msubsup>
          <mi>M</mi>
          <mn>2</mn>
          <mi>i</mi>
        </msubsup>
        <mo stretchy="false">−</mo>
        <mfrac>
          <mrow>
            <mi>F</mi>
            <mrow>
              <mo fence="true" stretchy="false">(</mo>
              <mrow>
                <msubsup>
                  <mi>M</mi>
                  <mn>2</mn>
                  <mi>i</mi>
                </msubsup>
              </mrow>
              <mo fence="true" stretchy="false">)</mo>
            </mrow>
          </mrow>
          <mrow>
            <mrow>
              <mi mathvariant="italic">dF</mi>
              <mrow>
                <mo fence="true" stretchy="false">(</mo>
                <mrow>
                  <msubsup>
                    <mi>M</mi>
                    <mn>2</mn>
                    <mi>i</mi>
                  </msubsup>
                </mrow>
                <mo fence="true" stretchy="false">)</mo>
              </mrow>
            </mrow>
            <mo stretchy="false">/</mo>
            <msub>
              <mi mathvariant="italic">dM</mi>
              <mn>2</mn>
            </msub>
          </mrow>
        </mfrac>
      </mrow>
    </mrow>
    <annotation encoding="StarMath 5.0">M sub 2 sup {i+1} = M sub 2 sup i - {F (M sub 2 sup i)} over {{dF (M sub 2 sup i)} / dM sub 2} </annotation>
  </semantics>
</math>
</file>

<file path=Object 8/content.xml><?xml version="1.0" encoding="utf-8"?>
<math xmlns="http://www.w3.org/1998/Math/MathML" display="block">
  <semantics>
    <mrow>
      <mrow>
        <mi>ν</mi>
        <mo stretchy="false">=</mo>
        <mrow>
          <mo stretchy="false">−</mo>
          <msqrt>
            <mi>b</mi>
          </msqrt>
        </mrow>
      </mrow>
      <mi>arctan</mi>
      <mrow>
        <mrow>
          <mo fence="true" stretchy="true">(</mo>
          <mrow>
            <mfrac>
              <mi>c</mi>
              <msqrt>
                <mi>b</mi>
              </msqrt>
            </mfrac>
          </mrow>
          <mo fence="true" stretchy="true">)</mo>
        </mrow>
        <mo stretchy="false">+</mo>
        <mi>arctan</mi>
      </mrow>
      <mrow>
        <mo fence="true" stretchy="false">(</mo>
        <mrow>
          <mi>c</mi>
        </mrow>
        <mo fence="true" stretchy="false">)</mo>
      </mrow>
    </mrow>
    <annotation encoding="StarMath 5.0"> %nu  = - sqrt{b} arctan left(c over sqrt{b} right) + arctan(c) </annotation>
  </semantics>
</math>
</file>