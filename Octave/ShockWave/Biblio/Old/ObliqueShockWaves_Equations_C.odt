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application/rdf+xml" manifest:full-path="manifest.rdf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o1" text:anchor-type="page" text:anchor-page-number="1" svg:x="5.394cm" svg:y="1.478cm" svg:width="9.86cm" svg:height="1.864cm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to3" text:anchor-type="page" text:anchor-page-number="1" svg:x="2.649cm" svg:y="14.092cm" svg:width="16.097cm" svg:height="1.496cm" draw:z-index="0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1" draw:name="Objeto4" text:anchor-type="page" text:anchor-page-number="1" svg:x="7.28cm" svg:y="9.442cm" svg:width="7.31cm" svg:height="2.297cm" draw:z-index="2">
        <draw:object xlink:href="./Object 4" xlink:type="simple" xlink:show="embed" xlink:actuate="onLoad"/>
        <draw:image xlink:href="./ObjectReplacements/Object 4" xlink:type="simple" xlink:show="embed" xlink:actuate="onLoad"/>
        <svg:desc>fórmula</svg:desc>
      </draw:frame>
      <draw:frame draw:style-name="fr1" draw:name="Objeto5" text:anchor-type="page" text:anchor-page-number="1" svg:x="7.825cm" svg:y="11.987cm" svg:width="6.01cm" svg:height="1.586cm" draw:z-index="6">
        <draw:object xlink:href="./Object 5" xlink:type="simple" xlink:show="embed" xlink:actuate="onLoad"/>
        <draw:image xlink:href="./ObjectReplacements/Object 5" xlink:type="simple" xlink:show="embed" xlink:actuate="onLoad"/>
      </draw:frame>
      <draw:frame draw:style-name="fr1" draw:name="Objeto6" text:anchor-type="page" text:anchor-page-number="1" svg:x="5.496cm" svg:y="16.226cm" svg:width="11.037cm" svg:height="1.499cm" draw:z-index="7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1" draw:name="Objeto2" text:anchor-type="page" text:anchor-page-number="1" svg:x="4.496cm" svg:y="5.422cm" svg:width="11.546cm" svg:height="1.812cm" draw:z-index="3">
        <draw:object xlink:href="./Object 2" xlink:type="simple" xlink:show="embed" xlink:actuate="onLoad"/>
        <draw:image xlink:href="./ObjectReplacements/Object 2" xlink:type="simple" xlink:show="embed" xlink:actuate="onLoad"/>
        <svg:desc>fórmula</svg:desc>
      </draw:frame>
      <draw:frame draw:style-name="fr1" draw:name="Objeto7" text:anchor-type="page" text:anchor-page-number="1" svg:x="5.205cm" svg:y="18.124cm" svg:width="12.063cm" svg:height="2.422cm" draw:z-index="4">
        <draw:object xlink:href="./Object 7" xlink:type="simple" xlink:show="embed" xlink:actuate="onLoad"/>
        <draw:image xlink:href="./ObjectReplacements/Object 7" xlink:type="simple" xlink:show="embed" xlink:actuate="onLoad"/>
        <svg:desc>fórmula</svg:desc>
      </draw:frame>
      <draw:frame draw:style-name="fr1" draw:name="Objeto8" text:anchor-type="page" text:anchor-page-number="1" svg:x="4.886cm" svg:y="22.798cm" svg:width="11.494cm" svg:height="2.332cm" draw:z-index="5">
        <draw:object xlink:href="./Object 8" xlink:type="simple" xlink:show="embed" xlink:actuate="onLoad"/>
        <draw:image xlink:href="./ObjectReplacements/Object 8" xlink:type="simple" xlink:show="embed" xlink:actuate="onLoad"/>
      </draw:frame>
      <text:p text:style-name="P1"/>
      <text:p text:style-name="P1"/>
      <text:p text:style-name="P1"/>
      <text:p text:style-name="P1"/>
      <text:p text:style-name="P3">Função a ser zerada,</text:p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4">Derivada da função de teta,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Mach 2 a direita da onda,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7M33S</meta:editing-duration>
    <meta:editing-cycles>24</meta:editing-cycles>
    <meta:generator>LibreOffice/3.5$Windows_x86 LibreOffice_project/165a79a-7059095-e13bb37-fef39a4-9503d18</meta:generator>
    <dc:date>2014-02-02T16:50:34.81</dc:date>
    <dc:creator>Jose Eduardo Mautone Barros</dc:creator>
    <meta:printed-by>Jose Eduardo Mautone Barros</meta:printed-by>
    <meta:print-date>2014-01-23T17:00:14.69</meta:print-date>
    <meta:document-statistic meta:table-count="0" meta:image-count="0" meta:object-count="8" meta:page-count="1" meta:paragraph-count="3" meta:word-count="15" meta:character-count="72" meta:non-whitespace-character-count="6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variant="italic">
        <mrow>
          <mrow>
            <mrow>
              <mfrac>
                <mrow>
                  <mi mathvariant="italic">cotg</mi>
                  <mo stretchy="false">δ</mo>
                </mrow>
                <mrow>
                  <mi mathvariant="italic">tg</mi>
                  <mo stretchy="false">θ</mo>
                </mrow>
              </mfrac>
              <mo stretchy="false">=</mo>
              <mfrac>
                <mrow>
                  <mrow>
                    <mo stretchy="false">(</mo>
                    <mrow>
                      <mrow>
                        <mo stretchy="false">γ</mo>
                        <mo stretchy="false">+</mo>
                        <mn>1</mn>
                      </mrow>
                    </mrow>
                    <mo stretchy="false">)</mo>
                  </mrow>
                  <mrow>
                    <msubsup>
                      <mi>M</mi>
                      <mn>1</mn>
                      <mn>2</mn>
                    </msubsup>
                    <mo stretchy="false">−</mo>
                    <mn>2</mn>
                  </mrow>
                  <mrow>
                    <mo stretchy="false">(</mo>
                    <mrow>
                      <msubsup>
                        <mi>M</mi>
                        <mn>1</mn>
                        <mn>2</mn>
                      </msubsup>
                      <msup>
                        <mi mathvariant="italic">sen</mi>
                        <mn>2</mn>
                      </msup>
                      <mrow>
                        <mo stretchy="false">θ</mo>
                        <mo stretchy="false">−</mo>
                        <mn>1</mn>
                      </mrow>
                    </mrow>
                    <mo stretchy="false">)</mo>
                  </mrow>
                </mrow>
                <mrow>
                  <mn>2</mn>
                  <mrow>
                    <mo stretchy="false">(</mo>
                    <mrow>
                      <msubsup>
                        <mi>M</mi>
                        <mn>1</mn>
                        <mn>2</mn>
                      </msubsup>
                      <msup>
                        <mi mathvariant="italic">sen</mi>
                        <mn>2</mn>
                      </msup>
                      <mrow>
                        <mo stretchy="false">θ</mo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row>
        </mrow>
      </mstyle>
    </mrow>
    <annotation encoding="StarMath 5.0">italic{ {cotg %delta} over {tg %theta} = {(%gamma+1)M_1^2-2(M_1^2 sen^2 %theta -1)} over {2(M_1^2 sen^2 %theta -1)}}</annotation>
  </semantics>
</math>
</file>

<file path=Object 2/content.xml><?xml version="1.0" encoding="utf-8"?>
<math xmlns="http://www.w3.org/1998/Math/MathML">
  <semantics>
    <mtable>
      <mtr>
        <mtd>
          <mrow>
            <mstyle mathvariant="italic">
              <mrow>
                <mrow>
                  <mrow>
                    <mi>F</mi>
                    <mo stretchy="false">=</mo>
                    <mrow>
                      <mrow>
                        <mo stretchy="false">−</mo>
                        <mn>2cotg</mn>
                      </mrow>
                      <mo stretchy="false">δ</mo>
                    </mrow>
                  </mrow>
                  <mrow>
                    <mrow>
                      <mo stretchy="false">(</mo>
                      <mrow>
                        <msubsup>
                          <mi>M</mi>
                          <mn>1</mn>
                          <mn>2</mn>
                        </msubsup>
                        <msup>
                          <mi mathvariant="italic">sen</mi>
                          <mn>2</mn>
                        </msup>
                        <mrow>
                          <mo stretchy="false">θ</mo>
                          <mo stretchy="false">−</mo>
                          <mn>1</mn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γ</mo>
                          <mo stretchy="false">+</mo>
                          <mn>1</mn>
                        </mrow>
                      </mrow>
                      <mo stretchy="false">)</mo>
                    </mrow>
                  </mrow>
                  <msubsup>
                    <mi>M</mi>
                    <mn>1</mn>
                    <mn>2</mn>
                  </msubsup>
                  <mrow>
                    <mi mathvariant="italic">tg</mi>
                    <mo stretchy="false">θ</mo>
                  </mrow>
                </mrow>
              </mrow>
            </mstyle>
          </mrow>
        </mtd>
      </mtr>
      <mtr>
        <mtd>
          <mrow>
            <mstyle mathvariant="italic">
              <mrow>
                <mrow>
                  <mrow>
                    <mo stretchy="false">−</mo>
                    <mn>2</mn>
                  </mrow>
                  <msubsup>
                    <mi>M</mi>
                    <mn>1</mn>
                    <mn>2</mn>
                  </msubsup>
                  <mrow>
                    <mi mathvariant="italic">tg</mi>
                    <mo stretchy="false">θ</mo>
                  </mrow>
                  <mrow>
                    <mrow>
                      <msup>
                        <mi mathvariant="italic">sen</mi>
                        <mn>2</mn>
                      </msup>
                      <mo stretchy="false">θ</mo>
                    </mrow>
                    <mo stretchy="false">+</mo>
                    <mn>2</mn>
                  </mrow>
                  <mrow>
                    <mrow>
                      <mi mathvariant="italic">tg</mi>
                      <mo stretchy="false">θ</mo>
                    </mrow>
                    <mo stretchy="false">=</mo>
                    <mn>0</mn>
                  </mrow>
                </mrow>
              </mrow>
            </mstyle>
          </mrow>
        </mtd>
      </mtr>
    </mtable>
    <annotation encoding="StarMath 5.0">italic{ F ={-2cotg %delta }(M_1^2 sen^2 %theta -1) + (%gamma+1)M_1^2 {tg %theta} } newline
italic { - 2 M_1^2 {tg %theta} {sen^2 %theta}+2{tg %theta} = 0}</annotation>
  </semantics>
</math>
</file>

<file path=Object 3/content.xml><?xml version="1.0" encoding="utf-8"?>
<math xmlns="http://www.w3.org/1998/Math/MathML">
  <semantics>
    <mrow>
      <mstyle mathvariant="italic">
        <mrow>
          <mrow>
            <mi mathvariant="italic">tg</mi>
            <mo stretchy="false">θ</mo>
            <msup>
              <mi mathvariant="italic">sen</mi>
              <mn>2</mn>
            </msup>
            <mrow>
              <mo stretchy="false">θ</mo>
              <mo stretchy="false">=</mo>
              <mfrac>
                <mrow>
                  <mi mathvariant="italic">sen</mi>
                  <mo stretchy="false">θ</mo>
                </mrow>
                <mrow>
                  <mi mathvariant="italic">cos</mi>
                  <mo stretchy="false">θ</mo>
                </mrow>
              </mfrac>
            </mrow>
            <msup>
              <mi mathvariant="italic">sen</mi>
              <mn>2</mn>
            </msup>
            <mrow>
              <mo stretchy="false">θ</mo>
              <mo stretchy="false">=</mo>
              <mrow>
                <mo stretchy="false">(</mo>
                <mrow>
                  <mrow>
                    <mn>1</mn>
                    <mo stretchy="false">−</mo>
                    <msup>
                      <mi mathvariant="italic">cos</mi>
                      <mn>2</mn>
                    </msup>
                  </mrow>
                  <mo stretchy="false">θ</mo>
                </mrow>
                <mo stretchy="false">)</mo>
              </mrow>
            </mrow>
            <mrow>
              <mfrac>
                <mrow>
                  <mi mathvariant="italic">sen</mi>
                  <mo stretchy="false">θ</mo>
                </mrow>
                <mrow>
                  <mi mathvariant="italic">cos</mi>
                  <mo stretchy="false">θ</mo>
                </mrow>
              </mfrac>
              <mo stretchy="false">=</mo>
              <mi mathvariant="italic">tg</mi>
            </mrow>
            <mrow>
              <mo stretchy="false">θ</mo>
              <mo stretchy="false">−</mo>
              <mi mathvariant="italic">sen</mi>
            </mrow>
            <mo stretchy="false">θ</mo>
            <mi mathvariant="italic">cos</mi>
            <mo stretchy="false">θ</mo>
          </mrow>
        </mrow>
      </mstyle>
    </mrow>
    <annotation encoding="StarMath 5.0">italic {tg %theta sen^2 %theta = {sen %theta} over {cos %theta} sen^2 %theta = (1 - cos^2 %theta ){sen %theta} over {cos %theta} = tg %theta - sen %theta cos %theta }</annotation>
  </semantics>
</math>
</file>

<file path=Object 4/content.xml><?xml version="1.0" encoding="utf-8"?>
<math xmlns="http://www.w3.org/1998/Math/MathML">
  <semantics>
    <mrow>
      <mstyle mathvariant="italic">
        <mrow>
          <mrow>
            <mrow>
              <mrow>
                <mfrac>
                  <mrow>
                    <mi>d</mi>
                    <mrow>
                      <mo stretchy="false">(</mo>
                      <mrow>
                        <mi mathvariant="italic">tg</mi>
                        <mo stretchy="false">θ</mo>
                      </mrow>
                      <mo stretchy="false">)</mo>
                    </mrow>
                  </mrow>
                  <mrow>
                    <mi>d</mi>
                    <mo stretchy="false">θ</mo>
                  </mrow>
                </mfrac>
                <mo stretchy="false">=</mo>
                <mrow>
                  <mfrac>
                    <mrow>
                      <mi>d</mi>
                      <mrow>
                        <mo stretchy="false">(</mo>
                        <mrow>
                          <mrow>
                            <mfrac>
                              <mrow>
                                <mi mathvariant="italic">sen</mi>
                                <mo stretchy="false">θ</mo>
                              </mrow>
                              <mrow>
                                <mi mathvariant="italic">cos</mi>
                                <mo stretchy="false">θ</mo>
                              </mrow>
                            </mfrac>
                          </mrow>
                        </mrow>
                        <mo stretchy="false">)</mo>
                      </mrow>
                    </mrow>
                    <mrow>
                      <mi>d</mi>
                      <mo stretchy="false">θ</mo>
                    </mrow>
                  </mfrac>
                </mrow>
              </mrow>
              <mo stretchy="false">=</mo>
              <msup>
                <mi mathvariant="italic">sec</mi>
                <mn>2</mn>
              </msup>
            </mrow>
            <mo stretchy="false">θ</mo>
          </mrow>
        </mrow>
      </mstyle>
    </mrow>
    <annotation encoding="StarMath 5.0">italic {{d (tg %theta)}over{d %theta}= { {d({{sen %theta} over {cos %theta}})} over {d %theta}} = sec^2 %theta}</annotation>
  </semantics>
</math>
</file>

<file path=Object 5/content.xml><?xml version="1.0" encoding="utf-8"?>
<math xmlns="http://www.w3.org/1998/Math/MathML">
  <semantics>
    <mrow>
      <mstyle mathvariant="italic">
        <mrow>
          <mrow>
            <mrow>
              <mfrac>
                <mrow>
                  <mi>d</mi>
                  <msup>
                    <mi mathvariant="italic">sen</mi>
                    <mn>2</mn>
                  </msup>
                  <mo stretchy="false">θ</mo>
                </mrow>
                <mrow>
                  <mi>d</mi>
                  <mo stretchy="false">θ</mo>
                </mrow>
              </mfrac>
              <mo stretchy="false">=</mo>
              <mn>2</mn>
            </mrow>
            <mi mathvariant="italic">sen</mi>
            <mo stretchy="false">θ</mo>
            <mi mathvariant="italic">cos</mi>
            <mo stretchy="false">θ</mo>
          </mrow>
        </mrow>
      </mstyle>
    </mrow>
    <annotation encoding="StarMath 5.0">italic {{d sen^2 %theta} over {d %theta} = 2 sen %theta cos %theta }</annotation>
  </semantics>
</math>
</file>

<file path=Object 6/content.xml><?xml version="1.0" encoding="utf-8"?>
<math xmlns="http://www.w3.org/1998/Math/MathML">
  <semantics>
    <mrow>
      <mstyle mathvariant="italic">
        <mrow>
          <mrow>
            <mrow>
              <mfrac>
                <mrow>
                  <mi>d</mi>
                  <mi mathvariant="italic">sen</mi>
                  <mo stretchy="false">θ</mo>
                  <mi mathvariant="italic">cos</mi>
                  <mo stretchy="false">θ</mo>
                </mrow>
                <mrow>
                  <mi>d</mi>
                  <mo stretchy="false">θ</mo>
                </mrow>
              </mfrac>
              <mo stretchy="false">=</mo>
              <msup>
                <mi mathvariant="italic">cos</mi>
                <mn>2</mn>
              </msup>
            </mrow>
            <mrow>
              <mo stretchy="false">θ</mo>
              <mo stretchy="false">−</mo>
              <msup>
                <mi mathvariant="italic">sen</mi>
                <mn>2</mn>
              </msup>
            </mrow>
            <mrow>
              <mo stretchy="false">θ</mo>
              <mo stretchy="false">=</mo>
              <mrow>
                <mn>1</mn>
                <mo stretchy="false">−</mo>
                <mn>2</mn>
              </mrow>
            </mrow>
            <msup>
              <mi mathvariant="italic">sen</mi>
              <mn>2</mn>
            </msup>
            <mo stretchy="false">θ</mo>
          </mrow>
        </mrow>
      </mstyle>
    </mrow>
    <annotation encoding="StarMath 5.0">italic {{d sen %theta cos %theta} over {d %theta} = cos^2 %theta- sen^2 %theta = 1 - 2 sen^2 %theta}</annotation>
  </semantics>
</math>
</file>

<file path=Object 7/content.xml><?xml version="1.0" encoding="utf-8"?>
<math xmlns="http://www.w3.org/1998/Math/MathML">
  <semantics>
    <mtable>
      <mtr>
        <mtd>
          <mrow>
            <mstyle mathvariant="italic">
              <mrow>
                <mrow>
                  <mrow>
                    <mfrac>
                      <mrow>
                        <mi mathvariant="italic">dF</mi>
                      </mrow>
                      <mrow>
                        <mi>d</mi>
                        <mo stretchy="false">θ</mo>
                      </mrow>
                    </mfrac>
                    <mo stretchy="false">=</mo>
                    <mrow>
                      <mrow>
                        <mo stretchy="false">−</mo>
                        <mrow>
                          <mfrac>
                            <mn>2</mn>
                            <mrow>
                              <mi mathvariant="italic">tg</mi>
                              <mo stretchy="false">δ</mo>
                            </mrow>
                          </mfrac>
                          <msubsup>
                            <mi>M</mi>
                            <mn>1</mn>
                            <mn>2</mn>
                          </msubsup>
                          <mn>2</mn>
                          <mi mathvariant="italic">sen</mi>
                          <mo stretchy="false">θ</mo>
                          <mi mathvariant="italic">cos</mi>
                          <mo stretchy="false">θ</mo>
                        </mrow>
                      </mrow>
                      <mo stretchy="false">+</mo>
                      <mrow>
                        <mo stretchy="false">(</mo>
                        <mrow>
                          <mrow>
                            <mo stretchy="false">γ</mo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</mrow>
                  <msubsup>
                    <mi>M</mi>
                    <mn>1</mn>
                    <mn>2</mn>
                  </msubsup>
                  <msup>
                    <mi mathvariant="italic">sec</mi>
                    <mn>2</mn>
                  </msup>
                  <mo stretchy="false">θ</mo>
                </mrow>
              </mrow>
            </mstyle>
          </mrow>
        </mtd>
      </mtr>
      <mtr>
        <mtd>
          <mrow>
            <mstyle mathvariant="italic">
              <mrow>
                <mrow>
                  <mrow>
                    <mi/>
                    <mo stretchy="false">−</mo>
                    <msubsup>
                      <mn>2M</mn>
                      <mn>1</mn>
                      <mn>2</mn>
                    </msubsup>
                  </mrow>
                  <mrow>
                    <mrow>
                      <mo stretchy="false">(</mo>
                      <mrow>
                        <msup>
                          <mi mathvariant="italic">sec</mi>
                          <mn>2</mn>
                        </msup>
                        <mrow>
                          <mo stretchy="false">θ</mo>
                          <mo stretchy="false">−</mo>
                          <msup>
                            <mi mathvariant="italic">cos</mi>
                            <mn>2</mn>
                          </msup>
                        </mrow>
                        <mrow>
                          <mo stretchy="false">θ</mo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o stretchy="false">θ</mo>
                      </mrow>
                      <mo stretchy="false">)</mo>
                    </mrow>
                    <mo stretchy="false">+</mo>
                    <mn>2</mn>
                  </mrow>
                  <msup>
                    <mi mathvariant="italic">sec</mi>
                    <mn>2</mn>
                  </msup>
                  <mo stretchy="false">θ</mo>
                </mrow>
              </mrow>
            </mstyle>
          </mrow>
        </mtd>
      </mtr>
    </mtable>
    <annotation encoding="StarMath 5.0">italic{ {dF} over{ d %theta} = -{2 over {tg %delta}M_1^2  2 sen %theta Cos %theta} + (%gamma+1)M_1^2 sec^2 %theta } newline 
italic {~~~~ - 2M_1^2 ( sec^2 %theta - cos^2 %theta + sen^2 %theta) + 2 sec^2 %theta}</annotation>
  </semantics>
</math>
</file>

<file path=Object 8/content.xml><?xml version="1.0" encoding="utf-8"?>
<math xmlns="http://www.w3.org/1998/Math/MathML">
  <semantics>
    <mrow>
      <mstyle mathvariant="italic">
        <mrow>
          <mrow>
            <mrow>
              <msubsup>
                <mi>M</mi>
                <mn>2</mn>
                <mn>2</mn>
              </msubsup>
              <mo stretchy="false">=</mo>
              <mfrac>
                <mrow>
                  <mn>1</mn>
                </mrow>
                <mrow>
                  <msup>
                    <mi mathvariant="italic">sen</mi>
                    <mn>2</mn>
                  </msup>
                  <mrow>
                    <mo stretchy="false">(</mo>
                    <mrow>
                      <mrow>
                        <mo stretchy="false">θ</mo>
                        <mo stretchy="false">−</mo>
                        <mo stretchy="false">δ</mo>
                      </mrow>
                    </mrow>
                    <mo stretchy="false">)</mo>
                  </mrow>
                </mrow>
              </mfrac>
            </mrow>
            <mfrac>
              <mrow>
                <mn>1</mn>
              </mrow>
              <mrow>
                <mrow>
                  <mfrac>
                    <mrow>
                      <mi mathvariant="italic">tg</mi>
                      <mo stretchy="false">θ</mo>
                    </mrow>
                    <mrow>
                      <mi mathvariant="italic">tg</mi>
                      <mrow>
                        <mo stretchy="false">(</mo>
                        <mrow>
                          <mrow>
                            <mo stretchy="false">θ</mo>
                            <mo stretchy="false">−</mo>
                            <mo stretchy="false">δ</mo>
                          </mrow>
                        </mrow>
                        <mo stretchy="false">)</mo>
                      </mrow>
                    </mrow>
                  </mfrac>
                  <mrow>
                    <mfrac>
                      <mrow>
                        <mrow>
                          <mo stretchy="false">(</mo>
                          <mrow>
                            <mrow>
                              <mo stretchy="false">γ</mo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  <mrow>
                        <mn>2</mn>
                      </mrow>
                    </mfrac>
                    <mo stretchy="false">−</mo>
                    <mfrac>
                      <mrow>
                        <mrow>
                          <mo stretchy="false">(</mo>
                          <mrow>
                            <mrow>
                              <mo stretchy="false">γ</mo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  <mrow>
                        <mn>2</mn>
                      </mrow>
                    </mfrac>
                  </mrow>
                </mrow>
              </mrow>
            </mfrac>
          </mrow>
        </mrow>
      </mstyle>
    </mrow>
    <annotation encoding="StarMath 5.0">italic { M_2^2 = {1} over  {sen^2 (%theta-%delta)} {1} over {{{tg %theta} over {tg (%theta-%delta)}{(%gamma+1)} over {2} - {(%gamma-1)} over {2}}}
  }</annotation>
  </semantics>
</math>
</file>