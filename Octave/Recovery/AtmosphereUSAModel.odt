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9de" officeooo:paragraph-rsid="000f69de"/>
    </style:style>
    <style:style style:name="P2" style:family="paragraph" style:parent-style-name="Standard">
      <style:text-properties officeooo:rsid="000f69de" officeooo:paragraph-rsid="0012ca61"/>
    </style:style>
    <style:style style:name="P3" style:family="paragraph" style:parent-style-name="Standard">
      <style:text-properties officeooo:rsid="000fbf25" officeooo:paragraph-rsid="000fbf25"/>
    </style:style>
    <style:style style:name="P4" style:family="paragraph" style:parent-style-name="Standard">
      <style:text-properties officeooo:rsid="000fbf25" officeooo:paragraph-rsid="0012ca61"/>
    </style:style>
    <style:style style:name="P5" style:family="paragraph" style:parent-style-name="Standard">
      <style:text-properties officeooo:paragraph-rsid="0012ca61"/>
    </style:style>
    <style:style style:name="P6" style:family="paragraph" style:parent-style-name="Standard">
      <style:text-properties officeooo:rsid="000f69de" officeooo:paragraph-rsid="0012ca61"/>
    </style:style>
    <style:style style:name="P7" style:family="paragraph" style:parent-style-name="Standard">
      <style:text-properties officeooo:rsid="000f69de" officeooo:paragraph-rsid="001b5000"/>
    </style:style>
    <style:style style:name="P8" style:family="paragraph" style:parent-style-name="Standard">
      <style:text-properties officeooo:rsid="000f69de" officeooo:paragraph-rsid="000f69de"/>
    </style:style>
    <style:style style:name="P9" style:family="paragraph" style:parent-style-name="Standard">
      <style:text-properties officeooo:rsid="001b85e7" officeooo:paragraph-rsid="001b85e7"/>
    </style:style>
    <style:style style:name="T1" style:family="text">
      <style:text-properties officeooo:rsid="000f69de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2ca61"/>
    </style:style>
    <style:style style:name="T6" style:family="text">
      <style:text-properties officeooo:rsid="001c2aa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titude geopotencial H e altitude geométrica Z, r<text:span text:style-name="T2">0</text:span> é o raio médio da Terra <text:span text:style-name="T6">de 6.356.766 m,</text:span></text:p>
      <text:p text:style-name="P1"/>
      <text:p text:style-name="P1"><draw:frame draw:style-name="fr1" draw:name="Objeto15" text:anchor-type="as-char" svg:y="-0.683cm" svg:width="1.901cm" svg:height="1.12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Para camadas isotérmicas na atmosfera,</text:p>
      <text:p text:style-name="P1"/>
      <text:p text:style-name="P1"><draw:frame draw:style-name="fr2" draw:name="Objeto1" text:anchor-type="as-char" svg:y="-0.377cm" svg:width="1.34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to2" text:anchor-type="as-char" svg:y="-0.619cm" svg:width="2.034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to3" text:anchor-type="as-char" svg:y="-0.377cm" svg:width="1.676cm" svg:height="0.48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to4" text:anchor-type="as-char" svg:y="-0.619cm" svg:width="2.9cm" svg:height="0.99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"/>
      <text:p text:style-name="P3">Integrando, de uma altitude <text:span text:style-name="T4">H</text:span><text:span text:style-name="T3">1</text:span> até <text:span text:style-name="T4">H</text:span><text:span text:style-name="T3">2</text:span></text:p>
      <text:p text:style-name="P3"/>
      <text:p text:style-name="P1"><draw:frame draw:style-name="fr2" draw:name="Objeto5" text:anchor-type="as-char" svg:y="-0.619cm" svg:width="5.214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Objeto6" text:anchor-type="as-char" svg:y="-0.683cm" svg:width="4.664cm" svg:height="1.12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5"><text:span text:style-name="T1">Para camadas </text:span><text:span text:style-name="T5">com variação linear de temperatura</text:span><text:span text:style-name="T1"> na atmosfera,</text:span></text:p>
      <text:p text:style-name="P2"/>
      <text:p text:style-name="P2"><draw:frame draw:style-name="fr2" draw:name="Objeto8" text:anchor-type="as-char" svg:y="-0.386cm" svg:width="3.56cm" svg:height="0.542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"/>
      <text:p text:style-name="P2"><draw:frame draw:style-name="fr2" draw:name="Objeto9" text:anchor-type="as-char" svg:y="-0.619cm" svg:width="2.034cm" svg:height="0.998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2"/>
      <text:p text:style-name="P2"><draw:frame draw:style-name="fr2" draw:name="Objeto10" text:anchor-type="as-char" svg:y="-0.377cm" svg:width="1.676cm" svg:height="0.483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2"/>
      <text:p text:style-name="P2"><draw:frame draw:style-name="fr2" draw:name="Objeto11" text:anchor-type="as-char" svg:y="-0.619cm" svg:width="5.546cm" svg:height="1.071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2"/>
      <text:p text:style-name="P4">Integrando, de uma altitude <text:span text:style-name="T4">H</text:span><text:span text:style-name="T3">1</text:span> até <text:span text:style-name="T4">H</text:span><text:span text:style-name="T3">2</text:span></text:p>
      <text:p text:style-name="P4"/>
      <text:p text:style-name="P2"><draw:frame draw:style-name="fr1" draw:name="Objeto7" text:anchor-type="as-char" svg:y="-0.674cm" svg:width="12.607cm" svg:height="1.169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to12" text:anchor-type="as-char" svg:y="-0.683cm" svg:width="12.458cm" svg:height="1.124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2"/>
      <text:p text:style-name="P7"><draw:frame draw:style-name="fr1" draw:name="Objeto13" text:anchor-type="as-char" svg:y="-0.743cm" svg:width="2.372cm" svg:height="1.244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text:tab/><text:tab/><text:tab/><draw:frame draw:style-name="fr1" draw:name="Objeto14" text:anchor-type="as-char" svg:y="-0.743cm" svg:width="2.565cm" svg:height="1.244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15:27:52.045058801</meta:creation-date>
    <dc:date>2020-10-29T16:40:23.163976302</dc:date>
    <meta:editing-duration>PT30M53S</meta:editing-duration>
    <meta:editing-cycles>13</meta:editing-cycles>
    <meta:generator>LibreOffice/7.0.1.2$Linux_X86_64 LibreOffice_project/00$Build-2</meta:generator>
    <meta:document-statistic meta:table-count="0" meta:image-count="0" meta:object-count="15" meta:page-count="1" meta:paragraph-count="19" meta:word-count="45" meta:character-count="267" meta:non-whitespace-character-count="224"/>
  </office:meta>
</office:document-meta>
</file>

<file path=Object 1/content.xml><?xml version="1.0" encoding="utf-8"?>
<math xmlns="http://www.w3.org/1998/Math/MathML" display="block">
  <semantics>
    <mrow>
      <mi>T</mi>
      <mo stretchy="false">=</mo>
      <mi mathvariant="italic">cte</mi>
    </mrow>
    <annotation encoding="StarMath 5.0">T=cte
</annotation>
  </semantics>
</math>
</file>

<file path=Object 10/content.xml><?xml version="1.0" encoding="utf-8"?>
<math xmlns="http://www.w3.org/1998/Math/MathML" display="block">
  <semantics>
    <mrow>
      <mrow>
        <mi>P</mi>
        <mo stretchy="false">=</mo>
        <mi>ρ</mi>
      </mrow>
      <mi mathvariant="italic">RT</mi>
    </mrow>
    <annotation encoding="StarMath 5.0">P = %rho RT</annotation>
  </semantics>
</math>
</file>

<file path=Object 11/content.xml><?xml version="1.0" encoding="utf-8"?>
<math xmlns="http://www.w3.org/1998/Math/MathML" display="block">
  <semantics>
    <mrow>
      <mrow>
        <mfrac>
          <mi mathvariant="italic">dP</mi>
          <mi>P</mi>
        </mfrac>
        <mo stretchy="false">=</mo>
        <mrow>
          <mo stretchy="false">−</mo>
          <mrow>
            <mfrac>
              <mi>g</mi>
              <mi>R</mi>
            </mfrac>
            <mfrac>
              <mn>1</mn>
              <mrow>
                <mo fence="true" stretchy="false">[</mo>
                <mrow>
                  <mrow>
                    <mrow>
                      <msub>
                        <mi>T</mi>
                        <mn>1</mn>
                      </msub>
                      <mo stretchy="false">+</mo>
                      <msub>
                        <mi>L</mi>
                        <mi>m</mi>
                      </msub>
                    </mrow>
                    <mrow>
                      <mo fence="true" stretchy="false">(</mo>
                      <mrow>
                        <mrow>
                          <mi>H</mi>
                          <mo stretchy="false">−</mo>
                          <msub>
                            <mi>H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frac>
          </mrow>
        </mrow>
      </mrow>
      <mi mathvariant="italic">dH</mi>
    </mrow>
    <annotation encoding="StarMath 5.0">dP over P = - {g over R 1 over { [T sub 1 + L sub m (H  - H sub 1 )]}} dH</annotation>
  </semantics>
</math>
</file>

<file path=Object 12/content.xml><?xml version="1.0" encoding="utf-8"?>
<math xmlns="http://www.w3.org/1998/Math/MathML" display="block">
  <semantics>
    <mrow>
      <mrow>
        <mfrac>
          <msub>
            <mi>P</mi>
            <mn>2</mn>
          </msub>
          <msub>
            <mi>P</mi>
            <mn>1</mn>
          </msub>
        </mfrac>
        <mo stretchy="false">=</mo>
        <mrow>
          <mo stretchy="false">−</mo>
          <mfrac>
            <mi>g</mi>
            <mi>R</mi>
          </mfrac>
        </mrow>
      </mrow>
      <mfrac>
        <mn>1</mn>
        <msub>
          <mi>L</mi>
          <mi>m</mi>
        </msub>
      </mfrac>
      <mi>ln</mi>
      <mrow>
        <mrow>
          <mo fence="true" stretchy="true">[</mo>
          <mrow>
            <mrow>
              <mrow>
                <msub>
                  <mi>T</mi>
                  <mn>1</mn>
                </msub>
                <mo stretchy="false">+</mo>
                <msub>
                  <mi>L</mi>
                  <mi>m</mi>
                </msub>
              </mrow>
              <mrow>
                <mo fence="true"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fence="true" stretchy="false">)</mo>
              </mrow>
            </mrow>
          </mrow>
          <mo fence="true" stretchy="true">]</mo>
        </mrow>
        <mo stretchy="false">+</mo>
        <mfrac>
          <mi>g</mi>
          <mi>R</mi>
        </mfrac>
      </mrow>
      <mfrac>
        <mn>1</mn>
        <msub>
          <mi>L</mi>
          <mi>m</mi>
        </msub>
      </mfrac>
      <mi>ln</mi>
      <mrow>
        <mrow>
          <mo fence="true" stretchy="true">[</mo>
          <mrow>
            <msub>
              <mi>T</mi>
              <mn>1</mn>
            </msub>
          </mrow>
          <mo fence="true" stretchy="true">]</mo>
        </mrow>
        <mo stretchy="false">=</mo>
        <mfrac>
          <mi>g</mi>
          <mi>R</mi>
        </mfrac>
      </mrow>
      <mfrac>
        <mn>1</mn>
        <msub>
          <mi>L</mi>
          <mi>m</mi>
        </msub>
      </mfrac>
      <mi>ln</mi>
      <mrow>
        <msub>
          <mi>T</mi>
          <mn>1</mn>
        </msub>
        <mo stretchy="false">−</mo>
        <mfrac>
          <mi>g</mi>
          <mi>R</mi>
        </mfrac>
      </mrow>
      <mfrac>
        <mn>1</mn>
        <msub>
          <mi>L</mi>
          <mi>m</mi>
        </msub>
      </mfrac>
      <mi>ln</mi>
      <msub>
        <mi>T</mi>
        <mn>2</mn>
      </msub>
    </mrow>
    <annotation encoding="StarMath 5.0">P sub 2 over P sub 1 =  - {g over R} 1 over  L sub m ln left[ T sub 1 + L sub m (H sub 2 - H sub 1) right] + {g over R} 1 over L sub m ln left[ T sub 1 right] = {g over R} 1 over  L sub m ln T sub 1 - {g over R} 1 over  L sub m ln T sub 2</annotation>
  </semantics>
</math>
</file>

<file path=Object 13/content.xml><?xml version="1.0" encoding="utf-8"?>
<math xmlns="http://www.w3.org/1998/Math/MathML" display="block">
  <semantics>
    <mrow>
      <mfrac>
        <msub>
          <mi>P</mi>
          <mn>2</mn>
        </msub>
        <msub>
          <mi>P</mi>
          <mn>1</mn>
        </msub>
      </mfrac>
      <mo stretchy="false">=</mo>
      <msup>
        <mrow>
          <mo fence="true" stretchy="true">(</mo>
          <mrow>
            <mfrac>
              <msub>
                <mi>T</mi>
                <mn>1</mn>
              </msub>
              <msub>
                <mi>T</mi>
                <mn>2</mn>
              </msub>
            </mfrac>
          </mrow>
          <mo fence="true" stretchy="true">)</mo>
        </mrow>
        <mfrac>
          <mi>g</mi>
          <mrow>
            <mi>R</mi>
            <msub>
              <mi>L</mi>
              <mi>m</mi>
            </msub>
          </mrow>
        </mfrac>
      </msup>
    </mrow>
    <annotation encoding="StarMath 5.0">P sub 2 over P sub 1 =  left( T sub 1 over T sub 2 right) sup { g over {R L sub m}}</annotation>
  </semantics>
</math>
</file>

<file path=Object 14/content.xml><?xml version="1.0" encoding="utf-8"?>
<math xmlns="http://www.w3.org/1998/Math/MathML" display="block">
  <semantics>
    <mrow>
      <mfrac>
        <msub>
          <mi>P</mi>
          <mn>2</mn>
        </msub>
        <msub>
          <mi>P</mi>
          <mn>1</mn>
        </msub>
      </mfrac>
      <mo stretchy="false">=</mo>
      <msup>
        <mrow>
          <mo fence="true" stretchy="true">(</mo>
          <mrow>
            <mfrac>
              <msub>
                <mi>T</mi>
                <mn>2</mn>
              </msub>
              <msub>
                <mi>T</mi>
                <mn>1</mn>
              </msub>
            </mfrac>
          </mrow>
          <mo fence="true" stretchy="true">)</mo>
        </mrow>
        <mrow>
          <mo stretchy="false">−</mo>
          <mfrac>
            <mi>g</mi>
            <mrow>
              <mi>R</mi>
              <msub>
                <mi>L</mi>
                <mi>m</mi>
              </msub>
            </mrow>
          </mfrac>
        </mrow>
      </msup>
    </mrow>
    <annotation encoding="StarMath 5.0">P sub 2 over P sub 1 =  left( T sub 2 over T sub 1 right) sup { - {g over {R L sub m}}}</annotation>
  </semantics>
</math>
</file>

<file path=Object 15/content.xml><?xml version="1.0" encoding="utf-8"?>
<math xmlns="http://www.w3.org/1998/Math/MathML" display="block">
  <semantics>
    <mrow>
      <mi>H</mi>
      <mo stretchy="false">=</mo>
      <mfrac>
        <mrow>
          <msub>
            <mi>r</mi>
            <mn>0</mn>
          </msub>
          <mi>Z</mi>
        </mrow>
        <mrow>
          <msub>
            <mi>r</mi>
            <mn>0</mn>
          </msub>
          <mo stretchy="false">+</mo>
          <mi>Z</mi>
        </mrow>
      </mfrac>
    </mrow>
    <annotation encoding="StarMath 5.0">H = {r sub 0 Z } over {r sub 0 + Z}</annotation>
  </semantics>
</math>
</file>

<file path=Object 2/content.xml><?xml version="1.0" encoding="utf-8"?>
<math xmlns="http://www.w3.org/1998/Math/MathML" display="block">
  <semantics>
    <mrow>
      <mrow>
        <mfrac>
          <mi mathvariant="italic">dP</mi>
          <mi mathvariant="italic">dH</mi>
        </mfrac>
        <mo stretchy="false">=</mo>
        <mrow>
          <mo stretchy="false">−</mo>
          <mi>ρ</mi>
        </mrow>
      </mrow>
      <mi>g</mi>
    </mrow>
    <annotation encoding="StarMath 5.0">dP over dH = - %rho g</annotation>
  </semantics>
</math>
</file>

<file path=Object 3/content.xml><?xml version="1.0" encoding="utf-8"?>
<math xmlns="http://www.w3.org/1998/Math/MathML" display="block">
  <semantics>
    <mrow>
      <mrow>
        <mi>P</mi>
        <mo stretchy="false">=</mo>
        <mi>ρ</mi>
      </mrow>
      <mi mathvariant="italic">RT</mi>
    </mrow>
    <annotation encoding="StarMath 5.0">P = %rho RT</annotation>
  </semantics>
</math>
</file>

<file path=Object 4/content.xml><?xml version="1.0" encoding="utf-8"?>
<math xmlns="http://www.w3.org/1998/Math/MathML" display="block">
  <semantics>
    <mrow>
      <mrow>
        <mi mathvariant="italic">dP</mi>
        <mo stretchy="false">=</mo>
        <mrow>
          <mo stretchy="false">−</mo>
          <mfrac>
            <mi>P</mi>
            <mi mathvariant="italic">RT</mi>
          </mfrac>
        </mrow>
      </mrow>
      <mi>g</mi>
      <mi mathvariant="italic">dH</mi>
    </mrow>
    <annotation encoding="StarMath 5.0">dP = - {P over RT} g dH</annotation>
  </semantics>
</math>
</file>

<file path=Object 5/content.xml><?xml version="1.0" encoding="utf-8"?>
<math xmlns="http://www.w3.org/1998/Math/MathML" display="block">
  <semantics>
    <mrow>
      <mi>ln</mi>
      <mrow>
        <msub>
          <mi>P</mi>
          <mn>2</mn>
        </msub>
        <mo stretchy="false">−</mo>
        <mi>ln</mi>
      </mrow>
      <mrow>
        <msub>
          <mi>P</mi>
          <mn>1</mn>
        </msub>
        <mo stretchy="false">=</mo>
        <mrow>
          <mo stretchy="false">−</mo>
          <mfrac>
            <mi>g</mi>
            <mi mathvariant="italic">RT</mi>
          </mfrac>
        </mrow>
      </mrow>
      <mrow>
        <mo fence="true" stretchy="false">(</mo>
        <mrow>
          <mrow>
            <msub>
              <mi>H</mi>
              <mn>2</mn>
            </msub>
            <mo stretchy="false">−</mo>
            <msub>
              <mi>H</mi>
              <mn>1</mn>
            </msub>
          </mrow>
        </mrow>
        <mo fence="true" stretchy="false">)</mo>
      </mrow>
    </mrow>
    <annotation encoding="StarMath 5.0">ln P sub 2 - ln P sub 1 = -{g over RT }( H sub 2 - H sub 1 )</annotation>
  </semantics>
</math>
</file>

<file path=Object 6/content.xml><?xml version="1.0" encoding="utf-8"?>
<math xmlns="http://www.w3.org/1998/Math/MathML" display="block">
  <semantics>
    <mrow>
      <mrow>
        <mfrac>
          <msub>
            <mi>P</mi>
            <mn>2</mn>
          </msub>
          <msub>
            <mi>P</mi>
            <mn>1</mn>
          </msub>
        </mfrac>
        <mo stretchy="false">=</mo>
        <mi>exp</mi>
      </mrow>
      <mrow>
        <mo fence="true" stretchy="true">[</mo>
        <mrow>
          <mrow>
            <mrow>
              <mo stretchy="false">−</mo>
              <mfrac>
                <mi>g</mi>
                <mi mathvariant="italic">RT</mi>
              </mfrac>
            </mrow>
            <mrow>
              <mo fence="true" stretchy="false">(</mo>
              <mrow>
                <mrow>
                  <msub>
                    <mi>H</mi>
                    <mn>2</mn>
                  </msub>
                  <mo stretchy="false">−</mo>
                  <msub>
                    <mi>H</mi>
                    <mn>1</mn>
                  </msub>
                </mrow>
              </mrow>
              <mo fence="true" stretchy="false">)</mo>
            </mrow>
          </mrow>
        </mrow>
        <mo fence="true" stretchy="true">]</mo>
      </mrow>
    </mrow>
    <annotation encoding="StarMath 5.0">P sub 2 over P sub 1 = exp left[  -{g over RT} ( H sub 2 - H sub1 ) right]</annotation>
  </semantics>
</math>
</file>

<file path=Object 7/content.xml><?xml version="1.0" encoding="utf-8"?>
<math xmlns="http://www.w3.org/1998/Math/MathML" display="block">
  <semantics>
    <mrow>
      <mi>ln</mi>
      <mrow>
        <msub>
          <mi>P</mi>
          <mn>2</mn>
        </msub>
        <mo stretchy="false">−</mo>
        <mi>ln</mi>
      </mrow>
      <mrow>
        <msub>
          <mi>P</mi>
          <mn>1</mn>
        </msub>
        <mo stretchy="false">=</mo>
        <mrow>
          <msub>
            <mrow>
              <mrow>
                <mrow>
                  <mrow>
                    <mo stretchy="false">−</mo>
                    <mfrac>
                      <mi>g</mi>
                      <mi>R</mi>
                    </mfrac>
                  </mrow>
                  <mfrac>
                    <mn>1</mn>
                    <msub>
                      <mi>L</mi>
                      <mi>m</mi>
                    </msub>
                  </mfrac>
                  <mi>ln</mi>
                  <mrow>
                    <mo fence="true" stretchy="true">[</mo>
                    <mrow>
                      <mrow>
                        <mrow>
                          <msub>
                            <mi>T</mi>
                            <mn>1</mn>
                          </msub>
                          <mo stretchy="false">+</mo>
                          <msub>
                            <mi>L</mi>
                            <mi>m</mi>
                          </msub>
                        </mrow>
                        <mrow>
                          <mo fence="true" stretchy="false">(</mo>
                          <mrow>
                            <mrow>
                              <mi>H</mi>
                              <mo stretchy="false">−</mo>
                              <msub>
                                <mi>H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</mrow>
              <mo fence="true" stretchy="true">|</mo>
            </mrow>
            <msub>
              <mi>H</mi>
              <mn>2</mn>
            </msub>
          </msub>
          <mo stretchy="false">+</mo>
          <msub>
            <mrow>
              <mrow>
                <mrow>
                  <mfrac>
                    <mi>g</mi>
                    <mi>R</mi>
                  </mfrac>
                  <mfrac>
                    <mn>1</mn>
                    <msub>
                      <mi>L</mi>
                      <mi>m</mi>
                    </msub>
                  </mfrac>
                  <mi>ln</mi>
                  <mrow>
                    <mo fence="true" stretchy="true">[</mo>
                    <mrow>
                      <mrow>
                        <mrow>
                          <msub>
                            <mi>T</mi>
                            <mn>1</mn>
                          </msub>
                          <mo stretchy="false">+</mo>
                          <msub>
                            <mi>L</mi>
                            <mi>m</mi>
                          </msub>
                        </mrow>
                        <mrow>
                          <mo fence="true" stretchy="false">(</mo>
                          <mrow>
                            <mrow>
                              <mi>H</mi>
                              <mo stretchy="false">−</mo>
                              <msub>
                                <mi>H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</mrow>
              <mo fence="true" stretchy="true">|</mo>
            </mrow>
            <msub>
              <mi>H</mi>
              <mn>1</mn>
            </msub>
          </msub>
        </mrow>
      </mrow>
    </mrow>
    <annotation encoding="StarMath 5.0">ln P sub 2 - ln P sub 1 =  left none {- {g over R} 1 over L sub m ln left[ T sub 1 + L sub m (H - H sub 1) right]} right rline_{H sub 2}  + left none { {g over R} 1 over L sub m ln left[ T sub 1 + L sub m (H - H sub 1) right]} right rline_{H sub 1}</annotation>
  </semantics>
</math>
</file>

<file path=Object 8/content.xml><?xml version="1.0" encoding="utf-8"?>
<math xmlns="http://www.w3.org/1998/Math/MathML" display="block">
  <semantics>
    <mrow>
      <mrow>
        <mi>T</mi>
        <mo stretchy="false">=</mo>
        <mrow>
          <msub>
            <mi>T</mi>
            <mn>1</mn>
          </msub>
          <mo stretchy="false">+</mo>
          <msub>
            <mi>L</mi>
            <mi>m</mi>
          </msub>
        </mrow>
      </mrow>
      <mrow>
        <mo fence="true" stretchy="false">(</mo>
        <mrow>
          <mrow>
            <mi>H</mi>
            <mo stretchy="false">−</mo>
            <msub>
              <mi>H</mi>
              <mn>1</mn>
            </msub>
          </mrow>
        </mrow>
        <mo fence="true" stretchy="false">)</mo>
      </mrow>
    </mrow>
    <annotation encoding="StarMath 5.0">T = T sub 1 + L sub m (H  - H sub 1 )
</annotation>
  </semantics>
</math>
</file>

<file path=Object 9/content.xml><?xml version="1.0" encoding="utf-8"?>
<math xmlns="http://www.w3.org/1998/Math/MathML" display="block">
  <semantics>
    <mrow>
      <mrow>
        <mfrac>
          <mi mathvariant="italic">dP</mi>
          <mi mathvariant="italic">dH</mi>
        </mfrac>
        <mo stretchy="false">=</mo>
        <mrow>
          <mo stretchy="false">−</mo>
          <mi>ρ</mi>
        </mrow>
      </mrow>
      <mi>g</mi>
    </mrow>
    <annotation encoding="StarMath 5.0">dP over dH = - %rho g</annotation>
  </semantics>
</math>
</file>